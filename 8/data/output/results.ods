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ouble_0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193839">
            <text:p>0.193839</text:p>
          </table:table-cell>
          <table:table-cell office:value-type="float" office:value="0.0147551">
            <text:p>0.0147551</text:p>
          </table:table-cell>
          <table:table-cell office:value-type="float" office:value="0.193839">
            <text:p>0.193839</text:p>
          </table:table-cell>
          <table:table-cell office:value-type="float" office:value="0.0147551">
            <text:p>0.014755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978598">
            <text:p>0.0978598</text:p>
          </table:table-cell>
          <table:table-cell office:value-type="float" office:value="0.00188035">
            <text:p>0.00188035</text:p>
          </table:table-cell>
          <table:table-cell office:value-type="float" office:value="0.0978598">
            <text:p>0.0978598</text:p>
          </table:table-cell>
          <table:table-cell office:value-type="float" office:value="0.00188035">
            <text:p>0.0018803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49048">
            <text:p>0.049048</text:p>
          </table:table-cell>
          <table:table-cell office:value-type="float" office:value="0.000236179">
            <text:p>0.000236179</text:p>
          </table:table-cell>
          <table:table-cell office:value-type="float" office:value="0.049048">
            <text:p>0.049048</text:p>
          </table:table-cell>
          <table:table-cell office:value-type="float" office:value="0.000236179">
            <text:p>0.00023617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245388">
            <text:p>0.0245388</text:p>
          </table:table-cell>
          <table:table-cell office:value-type="float" office:value="2.9558e-05">
            <text:p>2.9558e-05</text:p>
          </table:table-cell>
          <table:table-cell office:value-type="float" office:value="0.0245388">
            <text:p>0.0245388</text:p>
          </table:table-cell>
          <table:table-cell office:value-type="float" office:value="2.9558e-05">
            <text:p>2.9558e-0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122712">
            <text:p>0.0122712</text:p>
          </table:table-cell>
          <table:table-cell office:value-type="float" office:value="3.69587e-06">
            <text:p>3.69587e-06</text:p>
          </table:table-cell>
          <table:table-cell office:value-type="float" office:value="0.0122712">
            <text:p>0.0122712</text:p>
          </table:table-cell>
          <table:table-cell office:value-type="float" office:value="3.69587e-06">
            <text:p>3.69587e-0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0.00613585">
            <text:p>0.00613585</text:p>
          </table:table-cell>
          <table:table-cell office:value-type="float" office:value="4.62018e-07">
            <text:p>4.62018e-07</text:p>
          </table:table-cell>
          <table:table-cell office:value-type="float" office:value="0.00613585">
            <text:p>0.00613585</text:p>
          </table:table-cell>
          <table:table-cell office:value-type="float" office:value="4.62018e-07">
            <text:p>4.62018e-0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0.00306795">
            <text:p>0.00306795</text:p>
          </table:table-cell>
          <table:table-cell office:value-type="float" office:value="5.77533e-08">
            <text:p>5.77533e-08</text:p>
          </table:table-cell>
          <table:table-cell office:value-type="float" office:value="0.00306795">
            <text:p>0.00306795</text:p>
          </table:table-cell>
          <table:table-cell office:value-type="float" office:value="5.77533e-08">
            <text:p>5.77533e-0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0.00153398">
            <text:p>0.00153398</text:p>
          </table:table-cell>
          <table:table-cell office:value-type="float" office:value="7.21918e-09">
            <text:p>7.21918e-09</text:p>
          </table:table-cell>
          <table:table-cell office:value-type="float" office:value="0.00153398">
            <text:p>0.00153398</text:p>
          </table:table-cell>
          <table:table-cell office:value-type="float" office:value="7.21918e-09">
            <text:p>7.21918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0.00076699">
            <text:p>0.00076699</text:p>
          </table:table-cell>
          <table:table-cell office:value-type="float" office:value="9.02447e-10">
            <text:p>9.02447e-10</text:p>
          </table:table-cell>
          <table:table-cell office:value-type="float" office:value="0.00076699">
            <text:p>0.00076699</text:p>
          </table:table-cell>
          <table:table-cell office:value-type="float" office:value="9.02447e-10">
            <text:p>9.02447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0.000383495">
            <text:p>0.000383495</text:p>
          </table:table-cell>
          <table:table-cell office:value-type="float" office:value="1.12761e-10">
            <text:p>1.12761e-10</text:p>
          </table:table-cell>
          <table:table-cell office:value-type="float" office:value="0.000383495">
            <text:p>0.000383495</text:p>
          </table:table-cell>
          <table:table-cell office:value-type="float" office:value="1.12761e-10">
            <text:p>1.12761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0.000191748">
            <text:p>0.000191748</text:p>
          </table:table-cell>
          <table:table-cell office:value-type="float" office:value="1.38961e-11">
            <text:p>1.38961e-11</text:p>
          </table:table-cell>
          <table:table-cell office:value-type="float" office:value="0.000191748">
            <text:p>0.000191748</text:p>
          </table:table-cell>
          <table:table-cell office:value-type="float" office:value="1.38961e-11">
            <text:p>1.38961e-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9.58738e-05">
            <text:p>9.58738e-05</text:p>
          </table:table-cell>
          <table:table-cell office:value-type="float" office:value="1.44751e-12">
            <text:p>1.44751e-12</text:p>
          </table:table-cell>
          <table:table-cell office:value-type="float" office:value="9.58738e-05">
            <text:p>9.58738e-05</text:p>
          </table:table-cell>
          <table:table-cell office:value-type="float" office:value="1.44751e-12">
            <text:p>1.44751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4.79369e-05">
            <text:p>4.79369e-05</text:p>
          </table:table-cell>
          <table:table-cell office:value-type="float" office:value="0">
            <text:p>0</text:p>
          </table:table-cell>
          <table:table-cell office:value-type="float" office:value="4.79369e-05">
            <text:p>4.79369e-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2.39684e-05">
            <text:p>2.39684e-05</text:p>
          </table:table-cell>
          <table:table-cell office:value-type="float" office:value="1.158e-12">
            <text:p>1.158e-12</text:p>
          </table:table-cell>
          <table:table-cell office:value-type="float" office:value="2.39684e-05">
            <text:p>2.39684e-05</text:p>
          </table:table-cell>
          <table:table-cell office:value-type="float" office:value="1.158e-12">
            <text:p>1.158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1.19842e-05">
            <text:p>1.19842e-05</text:p>
          </table:table-cell>
          <table:table-cell office:value-type="float" office:value="4.63202e-12">
            <text:p>4.63202e-12</text:p>
          </table:table-cell>
          <table:table-cell office:value-type="float" office:value="1.19842e-05">
            <text:p>1.19842e-05</text:p>
          </table:table-cell>
          <table:table-cell office:value-type="float" office:value="4.63202e-12">
            <text:p>4.63202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5.99211e-06">
            <text:p>5.99211e-06</text:p>
          </table:table-cell>
          <table:table-cell office:value-type="float" office:value="9.26404e-12">
            <text:p>9.26404e-12</text:p>
          </table:table-cell>
          <table:table-cell office:value-type="float" office:value="5.99211e-06">
            <text:p>5.99211e-06</text:p>
          </table:table-cell>
          <table:table-cell office:value-type="float" office:value="9.26404e-12">
            <text:p>9.26404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2.99606e-06">
            <text:p>2.99606e-06</text:p>
          </table:table-cell>
          <table:table-cell office:value-type="float" office:value="1.85281e-11">
            <text:p>1.85281e-11</text:p>
          </table:table-cell>
          <table:table-cell office:value-type="float" office:value="2.99606e-06">
            <text:p>2.99606e-06</text:p>
          </table:table-cell>
          <table:table-cell office:value-type="float" office:value="1.85281e-11">
            <text:p>1.85281e-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1.49803e-06">
            <text:p>1.49803e-06</text:p>
          </table:table-cell>
          <table:table-cell office:value-type="float" office:value="0">
            <text:p>0</text:p>
          </table:table-cell>
          <table:table-cell office:value-type="float" office:value="1.49803e-06">
            <text:p>1.49803e-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7.48979e-07">
            <text:p>7.48979e-07</text:p>
          </table:table-cell>
          <table:table-cell office:value-type="float" office:value="7.41123e-11">
            <text:p>7.41123e-11</text:p>
          </table:table-cell>
          <table:table-cell office:value-type="float" office:value="7.48979e-07">
            <text:p>7.48979e-07</text:p>
          </table:table-cell>
          <table:table-cell office:value-type="float" office:value="7.41123e-11">
            <text:p>7.41123e-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3.74564e-07">
            <text:p>3.74564e-07</text:p>
          </table:table-cell>
          <table:table-cell office:value-type="float" office:value="1.48225e-10">
            <text:p>1.48225e-10</text:p>
          </table:table-cell>
          <table:table-cell office:value-type="float" office:value="3.74564e-07">
            <text:p>3.74564e-07</text:p>
          </table:table-cell>
          <table:table-cell office:value-type="float" office:value="1.48225e-10">
            <text:p>1.48225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1.87356e-07">
            <text:p>1.87356e-07</text:p>
          </table:table-cell>
          <table:table-cell office:value-type="float" office:value="1.48225e-10">
            <text:p>1.48225e-10</text:p>
          </table:table-cell>
          <table:table-cell office:value-type="float" office:value="1.87356e-07">
            <text:p>1.87356e-07</text:p>
          </table:table-cell>
          <table:table-cell office:value-type="float" office:value="1.48225e-10">
            <text:p>1.48225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9.36779e-08">
            <text:p>9.36779e-08</text:p>
          </table:table-cell>
          <table:table-cell office:value-type="float" office:value="0">
            <text:p>0</text:p>
          </table:table-cell>
          <table:table-cell office:value-type="float" office:value="9.36779e-08">
            <text:p>9.36779e-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4.62461e-08">
            <text:p>4.62461e-08</text:p>
          </table:table-cell>
          <table:table-cell office:value-type="float" office:value="1.1858e-09">
            <text:p>1.1858e-09</text:p>
          </table:table-cell>
          <table:table-cell office:value-type="float" office:value="4.62461e-08">
            <text:p>4.62461e-08</text:p>
          </table:table-cell>
          <table:table-cell office:value-type="float" office:value="1.1858e-09">
            <text:p>1.1858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2.37159e-08">
            <text:p>2.37159e-08</text:p>
          </table:table-cell>
          <table:table-cell office:value-type="float" office:value="1.1858e-09">
            <text:p>1.1858e-09</text:p>
          </table:table-cell>
          <table:table-cell office:value-type="float" office:value="2.37159e-08">
            <text:p>2.37159e-08</text:p>
          </table:table-cell>
          <table:table-cell office:value-type="float" office:value="1.1858e-09">
            <text:p>1.1858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9.48637e-09">
            <text:p>9.48637e-09</text:p>
          </table:table-cell>
          <table:table-cell office:value-type="float" office:value="4.74319e-09">
            <text:p>4.74319e-09</text:p>
          </table:table-cell>
          <table:table-cell office:value-type="float" office:value="9.48637e-09">
            <text:p>9.48637e-09</text:p>
          </table:table-cell>
          <table:table-cell office:value-type="float" office:value="4.74319e-09">
            <text:p>4.74319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9.48637e-09">
            <text:p>9.48637e-09</text:p>
          </table:table-cell>
          <table:table-cell office:value-type="float" office:value="9.48637e-09">
            <text:p>9.48637e-09</text:p>
          </table:table-cell>
          <table:table-cell office:value-type="float" office:value="9.48637e-09">
            <text:p>9.48637e-09</text:p>
          </table:table-cell>
          <table:table-cell office:value-type="float" office:value="9.48637e-09">
            <text:p>9.48637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0">
            <text:p>0</text:p>
          </table:table-cell>
          <table:table-cell office:value-type="float" office:value="9.48637e-09">
            <text:p>9.48637e-09</text:p>
          </table:table-cell>
          <table:table-cell office:value-type="float" office:value="0">
            <text:p>0</text:p>
          </table:table-cell>
          <table:table-cell office:value-type="float" office:value="9.48637e-09">
            <text:p>9.48637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double_pi_over_2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0255046">
            <text:p>0.0255046</text:p>
          </table:table-cell>
          <table:table-cell office:value-type="float" office:value="0.0486744">
            <text:p>0.0486744</text:p>
          </table:table-cell>
          <table:table-cell office:value-type="float" office:value="0.0255046">
            <text:p>0.0255046</text:p>
          </table:table-cell>
          <table:table-cell office:value-type="float" office:value="0.0486744">
            <text:p>0.0486744</text:p>
          </table:table-cell>
          <table:table-cell office:value-type="float" office:value="0.0255046">
            <text:p>0.0255046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0641315">
            <text:p>0.00641315</text:p>
          </table:table-cell>
          <table:table-cell office:value-type="float" office:value="0.0126783">
            <text:p>0.0126783</text:p>
          </table:table-cell>
          <table:table-cell office:value-type="float" office:value="0.00641315">
            <text:p>0.00641315</text:p>
          </table:table-cell>
          <table:table-cell office:value-type="float" office:value="0.0126783">
            <text:p>0.0126783</text:p>
          </table:table-cell>
          <table:table-cell office:value-type="float" office:value="0.00641315">
            <text:p>0.00641315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0160561">
            <text:p>0.00160561</text:p>
          </table:table-cell>
          <table:table-cell office:value-type="float" office:value="0.00320193">
            <text:p>0.00320193</text:p>
          </table:table-cell>
          <table:table-cell office:value-type="float" office:value="0.00160561">
            <text:p>0.00160561</text:p>
          </table:table-cell>
          <table:table-cell office:value-type="float" office:value="0.00320193">
            <text:p>0.00320193</text:p>
          </table:table-cell>
          <table:table-cell office:value-type="float" office:value="0.00160561">
            <text:p>0.00160561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00401547">
            <text:p>0.000401547</text:p>
          </table:table-cell>
          <table:table-cell office:value-type="float" office:value="0.000802513">
            <text:p>0.000802513</text:p>
          </table:table-cell>
          <table:table-cell office:value-type="float" office:value="0.000401547">
            <text:p>0.000401547</text:p>
          </table:table-cell>
          <table:table-cell office:value-type="float" office:value="0.000802513">
            <text:p>0.000802513</text:p>
          </table:table-cell>
          <table:table-cell office:value-type="float" office:value="0.000401547">
            <text:p>0.000401547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00100396">
            <text:p>0.000100396</text:p>
          </table:table-cell>
          <table:table-cell office:value-type="float" office:value="0.000200755">
            <text:p>0.000200755</text:p>
          </table:table-cell>
          <table:table-cell office:value-type="float" office:value="0.000100396">
            <text:p>0.000100396</text:p>
          </table:table-cell>
          <table:table-cell office:value-type="float" office:value="0.000200755">
            <text:p>0.000200755</text:p>
          </table:table-cell>
          <table:table-cell office:value-type="float" office:value="0.000100396">
            <text:p>0.000100396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2.50995e-05">
            <text:p>2.50995e-05</text:p>
          </table:table-cell>
          <table:table-cell office:value-type="float" office:value="5.01968e-05">
            <text:p>5.01968e-05</text:p>
          </table:table-cell>
          <table:table-cell office:value-type="float" office:value="2.50995e-05">
            <text:p>2.50995e-05</text:p>
          </table:table-cell>
          <table:table-cell office:value-type="float" office:value="5.01968e-05">
            <text:p>5.01968e-05</text:p>
          </table:table-cell>
          <table:table-cell office:value-type="float" office:value="2.50995e-05">
            <text:p>2.50995e-05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6.27491e-06">
            <text:p>6.27491e-06</text:p>
          </table:table-cell>
          <table:table-cell office:value-type="float" office:value="1.25497e-05">
            <text:p>1.25497e-05</text:p>
          </table:table-cell>
          <table:table-cell office:value-type="float" office:value="6.27491e-06">
            <text:p>6.27491e-06</text:p>
          </table:table-cell>
          <table:table-cell office:value-type="float" office:value="1.25497e-05">
            <text:p>1.25497e-05</text:p>
          </table:table-cell>
          <table:table-cell office:value-type="float" office:value="6.27491e-06">
            <text:p>6.27491e-06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1.56873e-06">
            <text:p>1.56873e-06</text:p>
          </table:table-cell>
          <table:table-cell office:value-type="float" office:value="3.13745e-06">
            <text:p>3.13745e-06</text:p>
          </table:table-cell>
          <table:table-cell office:value-type="float" office:value="1.56873e-06">
            <text:p>1.56873e-06</text:p>
          </table:table-cell>
          <table:table-cell office:value-type="float" office:value="3.13745e-06">
            <text:p>3.13745e-06</text:p>
          </table:table-cell>
          <table:table-cell office:value-type="float" office:value="1.56873e-06">
            <text:p>1.56873e-06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3.92183e-07">
            <text:p>3.92183e-07</text:p>
          </table:table-cell>
          <table:table-cell office:value-type="float" office:value="7.84365e-07">
            <text:p>7.84365e-07</text:p>
          </table:table-cell>
          <table:table-cell office:value-type="float" office:value="3.92183e-07">
            <text:p>3.92183e-07</text:p>
          </table:table-cell>
          <table:table-cell office:value-type="float" office:value="7.84365e-07">
            <text:p>7.84365e-07</text:p>
          </table:table-cell>
          <table:table-cell office:value-type="float" office:value="3.92183e-07">
            <text:p>3.92183e-07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9.80456e-08">
            <text:p>9.80456e-08</text:p>
          </table:table-cell>
          <table:table-cell office:value-type="float" office:value="1.96092e-07">
            <text:p>1.96092e-07</text:p>
          </table:table-cell>
          <table:table-cell office:value-type="float" office:value="9.80456e-08">
            <text:p>9.80456e-08</text:p>
          </table:table-cell>
          <table:table-cell office:value-type="float" office:value="1.96092e-07">
            <text:p>1.96092e-07</text:p>
          </table:table-cell>
          <table:table-cell office:value-type="float" office:value="9.80456e-08">
            <text:p>9.80456e-08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2.45113e-08">
            <text:p>2.45113e-08</text:p>
          </table:table-cell>
          <table:table-cell office:value-type="float" office:value="4.9023e-08">
            <text:p>4.9023e-08</text:p>
          </table:table-cell>
          <table:table-cell office:value-type="float" office:value="2.45113e-08">
            <text:p>2.45113e-08</text:p>
          </table:table-cell>
          <table:table-cell office:value-type="float" office:value="4.9023e-08">
            <text:p>4.9023e-08</text:p>
          </table:table-cell>
          <table:table-cell office:value-type="float" office:value="2.45113e-08">
            <text:p>2.45113e-08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6.12833e-09">
            <text:p>6.12833e-09</text:p>
          </table:table-cell>
          <table:table-cell office:value-type="float" office:value="1.22547e-08">
            <text:p>1.22547e-08</text:p>
          </table:table-cell>
          <table:table-cell office:value-type="float" office:value="6.12833e-09">
            <text:p>6.12833e-09</text:p>
          </table:table-cell>
          <table:table-cell office:value-type="float" office:value="1.22547e-08">
            <text:p>1.22547e-08</text:p>
          </table:table-cell>
          <table:table-cell office:value-type="float" office:value="6.12833e-09">
            <text:p>6.12833e-09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1.53128e-09">
            <text:p>1.53128e-09</text:p>
          </table:table-cell>
          <table:table-cell office:value-type="float" office:value="3.06577e-09">
            <text:p>3.06577e-09</text:p>
          </table:table-cell>
          <table:table-cell office:value-type="float" office:value="1.53128e-09">
            <text:p>1.53128e-09</text:p>
          </table:table-cell>
          <table:table-cell office:value-type="float" office:value="3.06577e-09">
            <text:p>3.06577e-09</text:p>
          </table:table-cell>
          <table:table-cell office:value-type="float" office:value="1.53128e-09">
            <text:p>1.53128e-09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3.84623e-10">
            <text:p>3.84623e-10</text:p>
          </table:table-cell>
          <table:table-cell office:value-type="float" office:value="7.62034e-10">
            <text:p>7.62034e-10</text:p>
          </table:table-cell>
          <table:table-cell office:value-type="float" office:value="3.84623e-10">
            <text:p>3.84623e-10</text:p>
          </table:table-cell>
          <table:table-cell office:value-type="float" office:value="7.62034e-10">
            <text:p>7.62034e-10</text:p>
          </table:table-cell>
          <table:table-cell office:value-type="float" office:value="3.84623e-10">
            <text:p>3.84623e-1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9.73795e-11">
            <text:p>9.73795e-11</text:p>
          </table:table-cell>
          <table:table-cell office:value-type="float" office:value="1.89863e-10">
            <text:p>1.89863e-10</text:p>
          </table:table-cell>
          <table:table-cell office:value-type="float" office:value="9.73797e-11">
            <text:p>9.73797e-11</text:p>
          </table:table-cell>
          <table:table-cell office:value-type="float" office:value="1.89864e-10">
            <text:p>1.89864e-10</text:p>
          </table:table-cell>
          <table:table-cell office:value-type="float" office:value="9.73795e-11">
            <text:p>9.73795e-11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2.55689e-11">
            <text:p>2.55689e-11</text:p>
          </table:table-cell>
          <table:table-cell office:value-type="float" office:value="4.62421e-11">
            <text:p>4.62421e-11</text:p>
          </table:table-cell>
          <table:table-cell office:value-type="float" office:value="2.55687e-11">
            <text:p>2.55687e-11</text:p>
          </table:table-cell>
          <table:table-cell office:value-type="float" office:value="4.62421e-11">
            <text:p>4.62421e-11</text:p>
          </table:table-cell>
          <table:table-cell office:value-type="float" office:value="2.55689e-11">
            <text:p>2.55689e-11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7.61613e-12">
            <text:p>7.61613e-12</text:p>
          </table:table-cell>
          <table:table-cell office:value-type="float" office:value="1.03368e-11">
            <text:p>1.03368e-11</text:p>
          </table:table-cell>
          <table:table-cell office:value-type="float" office:value="7.61613e-12">
            <text:p>7.61613e-12</text:p>
          </table:table-cell>
          <table:table-cell office:value-type="float" office:value="1.03364e-11">
            <text:p>1.03364e-11</text:p>
          </table:table-cell>
          <table:table-cell office:value-type="float" office:value="7.61613e-12">
            <text:p>7.61613e-12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3.39284e-11">
            <text:p>3.39284e-11</text:p>
          </table:table-cell>
          <table:table-cell office:value-type="float" office:value="7.54727e-11">
            <text:p>7.54727e-11</text:p>
          </table:table-cell>
          <table:table-cell office:value-type="float" office:value="3.39282e-11">
            <text:p>3.39282e-11</text:p>
          </table:table-cell>
          <table:table-cell office:value-type="float" office:value="7.54725e-11">
            <text:p>7.54725e-11</text:p>
          </table:table-cell>
          <table:table-cell office:value-type="float" office:value="3.39282e-11">
            <text:p>3.39282e-11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3.90619e-11">
            <text:p>3.90619e-11</text:p>
          </table:table-cell>
          <table:table-cell office:value-type="float" office:value="1.12052e-10">
            <text:p>1.12052e-10</text:p>
          </table:table-cell>
          <table:table-cell office:value-type="float" office:value="3.9062e-11">
            <text:p>3.9062e-11</text:p>
          </table:table-cell>
          <table:table-cell office:value-type="float" office:value="1.12052e-10">
            <text:p>1.12052e-10</text:p>
          </table:table-cell>
          <table:table-cell office:value-type="float" office:value="3.9062e-11">
            <text:p>3.9062e-11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3.87815e-11">
            <text:p>3.87815e-11</text:p>
          </table:table-cell>
          <table:table-cell office:value-type="float" office:value="3.85012e-11">
            <text:p>3.85012e-11</text:p>
          </table:table-cell>
          <table:table-cell office:value-type="float" office:value="3.87814e-11">
            <text:p>3.87814e-11</text:p>
          </table:table-cell>
          <table:table-cell office:value-type="float" office:value="3.85009e-11">
            <text:p>3.85009e-11</text:p>
          </table:table-cell>
          <table:table-cell office:value-type="float" office:value="3.87815e-11">
            <text:p>3.87815e-11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3.87115e-11">
            <text:p>3.87115e-11</text:p>
          </table:table-cell>
          <table:table-cell office:value-type="float" office:value="3.86412e-11">
            <text:p>3.86412e-11</text:p>
          </table:table-cell>
          <table:table-cell office:value-type="float" office:value="3.87113e-11">
            <text:p>3.87113e-11</text:p>
          </table:table-cell>
          <table:table-cell office:value-type="float" office:value="3.86413e-11">
            <text:p>3.86413e-11</text:p>
          </table:table-cell>
          <table:table-cell office:value-type="float" office:value="3.87115e-11">
            <text:p>3.87115e-11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5.54204e-10">
            <text:p>5.54204e-10</text:p>
          </table:table-cell>
          <table:table-cell office:value-type="float" office:value="1.14712e-09">
            <text:p>1.14712e-09</text:p>
          </table:table-cell>
          <table:table-cell office:value-type="float" office:value="5.54205e-10">
            <text:p>5.54205e-10</text:p>
          </table:table-cell>
          <table:table-cell office:value-type="float" office:value="1.14712e-09">
            <text:p>1.14712e-09</text:p>
          </table:table-cell>
          <table:table-cell office:value-type="float" office:value="5.54204e-10">
            <text:p>5.54204e-10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6.31588e-10">
            <text:p>6.31588e-10</text:p>
          </table:table-cell>
          <table:table-cell office:value-type="float" office:value="1.81738e-09">
            <text:p>1.81738e-09</text:p>
          </table:table-cell>
          <table:table-cell office:value-type="float" office:value="6.31588e-10">
            <text:p>6.31588e-10</text:p>
          </table:table-cell>
          <table:table-cell office:value-type="float" office:value="1.81738e-09">
            <text:p>1.81738e-09</text:p>
          </table:table-cell>
          <table:table-cell office:value-type="float" office:value="6.31588e-10">
            <text:p>6.31588e-10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6.31587e-10">
            <text:p>6.31587e-10</text:p>
          </table:table-cell>
          <table:table-cell office:value-type="float" office:value="6.31586e-10">
            <text:p>6.31586e-10</text:p>
          </table:table-cell>
          <table:table-cell office:value-type="float" office:value="6.31587e-10">
            <text:p>6.31587e-10</text:p>
          </table:table-cell>
          <table:table-cell office:value-type="float" office:value="6.31585e-10">
            <text:p>6.31585e-10</text:p>
          </table:table-cell>
          <table:table-cell office:value-type="float" office:value="6.31587e-10">
            <text:p>6.31587e-10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6.31586e-10">
            <text:p>6.31586e-10</text:p>
          </table:table-cell>
          <table:table-cell office:value-type="float" office:value="6.31586e-10">
            <text:p>6.31586e-10</text:p>
          </table:table-cell>
          <table:table-cell office:value-type="float" office:value="6.31586e-10">
            <text:p>6.31586e-10</text:p>
          </table:table-cell>
          <table:table-cell office:value-type="float" office:value="6.31586e-10">
            <text:p>6.31586e-10</text:p>
          </table:table-cell>
          <table:table-cell office:value-type="float" office:value="6.31586e-10">
            <text:p>6.31586e-10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8.85479e-09">
            <text:p>8.85479e-09</text:p>
          </table:table-cell>
          <table:table-cell office:value-type="float" office:value="1.83412e-08">
            <text:p>1.83412e-08</text:p>
          </table:table-cell>
          <table:table-cell office:value-type="float" office:value="8.85479e-09">
            <text:p>8.85479e-09</text:p>
          </table:table-cell>
          <table:table-cell office:value-type="float" office:value="1.83412e-08">
            <text:p>1.83412e-08</text:p>
          </table:table-cell>
          <table:table-cell office:value-type="float" office:value="8.85479e-09">
            <text:p>8.85479e-09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1.0118e-08">
            <text:p>1.0118e-08</text:p>
          </table:table-cell>
          <table:table-cell office:value-type="float" office:value="2.90907e-08">
            <text:p>2.90907e-08</text:p>
          </table:table-cell>
          <table:table-cell office:value-type="float" office:value="1.0118e-08">
            <text:p>1.0118e-08</text:p>
          </table:table-cell>
          <table:table-cell office:value-type="float" office:value="2.90907e-08">
            <text:p>2.90907e-08</text:p>
          </table:table-cell>
          <table:table-cell office:value-type="float" office:value="1.0118e-08">
            <text:p>1.0118e-08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2.78275e-08">
            <text:p>2.78275e-08</text:p>
          </table:table-cell>
          <table:table-cell office:value-type="float" office:value="6.5773e-08">
            <text:p>6.5773e-08</text:p>
          </table:table-cell>
          <table:table-cell office:value-type="float" office:value="2.78275e-08">
            <text:p>2.78275e-08</text:p>
          </table:table-cell>
          <table:table-cell office:value-type="float" office:value="6.5773e-08">
            <text:p>6.5773e-08</text:p>
          </table:table-cell>
          <table:table-cell office:value-type="float" office:value="2.78275e-08">
            <text:p>2.78275e-08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4.80635e-08">
            <text:p>4.80635e-08</text:p>
          </table:table-cell>
          <table:table-cell office:value-type="float" office:value="1.23954e-07">
            <text:p>1.23954e-07</text:p>
          </table:table-cell>
          <table:table-cell office:value-type="float" office:value="4.80635e-08">
            <text:p>4.80635e-08</text:p>
          </table:table-cell>
          <table:table-cell office:value-type="float" office:value="1.23954e-07">
            <text:p>1.23954e-07</text:p>
          </table:table-cell>
          <table:table-cell office:value-type="float" office:value="4.80635e-08">
            <text:p>4.80635e-08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1.03719e-07">
            <text:p>1.03719e-07</text:p>
          </table:table-cell>
          <table:table-cell office:value-type="float" office:value="2.55501e-07">
            <text:p>2.55501e-07</text:p>
          </table:table-cell>
          <table:table-cell office:value-type="float" office:value="1.03719e-07">
            <text:p>1.03719e-07</text:p>
          </table:table-cell>
          <table:table-cell office:value-type="float" office:value="2.55501e-07">
            <text:p>2.55501e-07</text:p>
          </table:table-cell>
          <table:table-cell office:value-type="float" office:value="1.03719e-07">
            <text:p>1.03719e-07</text:p>
          </table:table-cell>
        </table:table-row>
      </table:table>
      <table:table table:name="double_pi_over_4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11903">
            <text:p>0.11903</text:p>
          </table:table-cell>
          <table:table-cell office:value-type="float" office:value="0.0448515">
            <text:p>0.0448515</text:p>
          </table:table-cell>
          <table:table-cell office:value-type="float" office:value="0.1551">
            <text:p>0.1551</text:p>
          </table:table-cell>
          <table:table-cell office:value-type="float" office:value="0.0239845">
            <text:p>0.0239845</text:p>
          </table:table-cell>
          <table:table-cell office:value-type="float" office:value="0.0180345">
            <text:p>0.0180345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646625">
            <text:p>0.0646625</text:p>
          </table:table-cell>
          <table:table-cell office:value-type="float" office:value="0.0102945">
            <text:p>0.0102945</text:p>
          </table:table-cell>
          <table:table-cell office:value-type="float" office:value="0.0737321">
            <text:p>0.0737321</text:p>
          </table:table-cell>
          <table:table-cell office:value-type="float" office:value="0.00763534">
            <text:p>0.00763534</text:p>
          </table:table-cell>
          <table:table-cell office:value-type="float" office:value="0.00453478">
            <text:p>0.00453478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335468">
            <text:p>0.0335468</text:p>
          </table:table-cell>
          <table:table-cell office:value-type="float" office:value="0.00243111">
            <text:p>0.00243111</text:p>
          </table:table-cell>
          <table:table-cell office:value-type="float" office:value="0.0358175">
            <text:p>0.0358175</text:p>
          </table:table-cell>
          <table:table-cell office:value-type="float" office:value="0.00209711">
            <text:p>0.00209711</text:p>
          </table:table-cell>
          <table:table-cell office:value-type="float" office:value="0.00113534">
            <text:p>0.00113534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170676">
            <text:p>0.0170676</text:p>
          </table:table-cell>
          <table:table-cell office:value-type="float" office:value="0.000588363">
            <text:p>0.000588363</text:p>
          </table:table-cell>
          <table:table-cell office:value-type="float" office:value="0.0176355">
            <text:p>0.0176355</text:p>
          </table:table-cell>
          <table:table-cell office:value-type="float" office:value="0.000546562">
            <text:p>0.000546562</text:p>
          </table:table-cell>
          <table:table-cell office:value-type="float" office:value="0.000283937">
            <text:p>0.000283937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0860608">
            <text:p>0.00860608</text:p>
          </table:table-cell>
          <table:table-cell office:value-type="float" office:value="0.000144569">
            <text:p>0.000144569</text:p>
          </table:table-cell>
          <table:table-cell office:value-type="float" office:value="0.00874806">
            <text:p>0.00874806</text:p>
          </table:table-cell>
          <table:table-cell office:value-type="float" office:value="0.000139342">
            <text:p>0.000139342</text:p>
          </table:table-cell>
          <table:table-cell office:value-type="float" office:value="7.09905e-05">
            <text:p>7.09905e-05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0.00432095">
            <text:p>0.00432095</text:p>
          </table:table-cell>
          <table:table-cell office:value-type="float" office:value="3.58212e-05">
            <text:p>3.58212e-05</text:p>
          </table:table-cell>
          <table:table-cell office:value-type="float" office:value="0.00435645">
            <text:p>0.00435645</text:p>
          </table:table-cell>
          <table:table-cell office:value-type="float" office:value="3.51678e-05">
            <text:p>3.51678e-05</text:p>
          </table:table-cell>
          <table:table-cell office:value-type="float" office:value="1.7748e-05">
            <text:p>1.7748e-05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0.00216493">
            <text:p>0.00216493</text:p>
          </table:table-cell>
          <table:table-cell office:value-type="float" office:value="8.91481e-06">
            <text:p>8.91481e-06</text:p>
          </table:table-cell>
          <table:table-cell office:value-type="float" office:value="0.00217381">
            <text:p>0.00217381</text:p>
          </table:table-cell>
          <table:table-cell office:value-type="float" office:value="8.83313e-06">
            <text:p>8.83313e-06</text:p>
          </table:table-cell>
          <table:table-cell office:value-type="float" office:value="4.43703e-06">
            <text:p>4.43703e-06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0.00108358">
            <text:p>0.00108358</text:p>
          </table:table-cell>
          <table:table-cell office:value-type="float" office:value="2.22362e-06">
            <text:p>2.22362e-06</text:p>
          </table:table-cell>
          <table:table-cell office:value-type="float" office:value="0.0010858">
            <text:p>0.0010858</text:p>
          </table:table-cell>
          <table:table-cell office:value-type="float" office:value="2.21341e-06">
            <text:p>2.21341e-06</text:p>
          </table:table-cell>
          <table:table-cell office:value-type="float" office:value="1.10926e-06">
            <text:p>1.10926e-06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0.000542067">
            <text:p>0.000542067</text:p>
          </table:table-cell>
          <table:table-cell office:value-type="float" office:value="5.55268e-07">
            <text:p>5.55268e-07</text:p>
          </table:table-cell>
          <table:table-cell office:value-type="float" office:value="0.000542621">
            <text:p>0.000542621</text:p>
          </table:table-cell>
          <table:table-cell office:value-type="float" office:value="5.53992e-07">
            <text:p>5.53992e-07</text:p>
          </table:table-cell>
          <table:table-cell office:value-type="float" office:value="2.77315e-07">
            <text:p>2.77315e-07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0.000271103">
            <text:p>0.000271103</text:p>
          </table:table-cell>
          <table:table-cell office:value-type="float" office:value="1.38737e-07">
            <text:p>1.38737e-07</text:p>
          </table:table-cell>
          <table:table-cell office:value-type="float" office:value="0.000271241">
            <text:p>0.000271241</text:p>
          </table:table-cell>
          <table:table-cell office:value-type="float" office:value="1.38578e-07">
            <text:p>1.38578e-07</text:p>
          </table:table-cell>
          <table:table-cell office:value-type="float" office:value="6.93288e-08">
            <text:p>6.93288e-08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0.000135569">
            <text:p>0.000135569</text:p>
          </table:table-cell>
          <table:table-cell office:value-type="float" office:value="3.46746e-08">
            <text:p>3.46746e-08</text:p>
          </table:table-cell>
          <table:table-cell office:value-type="float" office:value="0.000135603">
            <text:p>0.000135603</text:p>
          </table:table-cell>
          <table:table-cell office:value-type="float" office:value="3.46541e-08">
            <text:p>3.46541e-08</text:p>
          </table:table-cell>
          <table:table-cell office:value-type="float" office:value="1.73322e-08">
            <text:p>1.73322e-08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6.77887e-05">
            <text:p>6.77887e-05</text:p>
          </table:table-cell>
          <table:table-cell office:value-type="float" office:value="8.66843e-09">
            <text:p>8.66843e-09</text:p>
          </table:table-cell>
          <table:table-cell office:value-type="float" office:value="6.77973e-05">
            <text:p>6.77973e-05</text:p>
          </table:table-cell>
          <table:table-cell office:value-type="float" office:value="8.66495e-09">
            <text:p>8.66495e-09</text:p>
          </table:table-cell>
          <table:table-cell office:value-type="float" office:value="4.33278e-09">
            <text:p>4.33278e-09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3.38954e-05">
            <text:p>3.38954e-05</text:p>
          </table:table-cell>
          <table:table-cell office:value-type="float" office:value="2.16768e-09">
            <text:p>2.16768e-09</text:p>
          </table:table-cell>
          <table:table-cell office:value-type="float" office:value="3.38976e-05">
            <text:p>3.38976e-05</text:p>
          </table:table-cell>
          <table:table-cell office:value-type="float" office:value="2.16421e-09">
            <text:p>2.16421e-09</text:p>
          </table:table-cell>
          <table:table-cell office:value-type="float" office:value="1.08342e-09">
            <text:p>1.08342e-09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1.6948e-05">
            <text:p>1.6948e-05</text:p>
          </table:table-cell>
          <table:table-cell office:value-type="float" office:value="5.46474e-10">
            <text:p>5.46474e-10</text:p>
          </table:table-cell>
          <table:table-cell office:value-type="float" office:value="1.69485e-05">
            <text:p>1.69485e-05</text:p>
          </table:table-cell>
          <table:table-cell office:value-type="float" office:value="5.40684e-10">
            <text:p>5.40684e-10</text:p>
          </table:table-cell>
          <table:table-cell office:value-type="float" office:value="2.6992e-10">
            <text:p>2.6992e-1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8.47406e-06">
            <text:p>8.47406e-06</text:p>
          </table:table-cell>
          <table:table-cell office:value-type="float" office:value="1.40014e-10">
            <text:p>1.40014e-10</text:p>
          </table:table-cell>
          <table:table-cell office:value-type="float" office:value="8.4742e-06">
            <text:p>8.4742e-06</text:p>
          </table:table-cell>
          <table:table-cell office:value-type="float" office:value="1.26118e-10">
            <text:p>1.26118e-10</text:p>
          </table:table-cell>
          <table:table-cell office:value-type="float" office:value="6.84268e-11">
            <text:p>6.84268e-11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4.23705e-06">
            <text:p>4.23705e-06</text:p>
          </table:table-cell>
          <table:table-cell office:value-type="float" office:value="4.73737e-11">
            <text:p>4.73737e-11</text:p>
          </table:table-cell>
          <table:table-cell office:value-type="float" office:value="4.23709e-06">
            <text:p>4.23709e-06</text:p>
          </table:table-cell>
          <table:table-cell office:value-type="float" office:value="1.95816e-11">
            <text:p>1.95816e-11</text:p>
          </table:table-cell>
          <table:table-cell office:value-type="float" office:value="1.74746e-11">
            <text:p>1.74746e-11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2.11852e-06">
            <text:p>2.11852e-06</text:p>
          </table:table-cell>
          <table:table-cell office:value-type="float" office:value="5.68545e-12">
            <text:p>5.68545e-12</text:p>
          </table:table-cell>
          <table:table-cell office:value-type="float" office:value="2.11855e-06">
            <text:p>2.11855e-06</text:p>
          </table:table-cell>
          <table:table-cell office:value-type="float" office:value="2.21066e-11">
            <text:p>2.21066e-11</text:p>
          </table:table-cell>
          <table:table-cell office:value-type="float" office:value="1.28426e-11">
            <text:p>1.28426e-11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1.05927e-06">
            <text:p>1.05927e-06</text:p>
          </table:table-cell>
          <table:table-cell office:value-type="float" office:value="4.27416e-11">
            <text:p>4.27416e-11</text:p>
          </table:table-cell>
          <table:table-cell office:value-type="float" office:value="1.05926e-06">
            <text:p>1.05926e-06</text:p>
          </table:table-cell>
          <table:table-cell office:value-type="float" office:value="5.68545e-12">
            <text:p>5.68545e-12</text:p>
          </table:table-cell>
          <table:table-cell office:value-type="float" office:value="5.68545e-12">
            <text:p>5.68545e-12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5.29705e-07">
            <text:p>5.29705e-07</text:p>
          </table:table-cell>
          <table:table-cell office:value-type="float" office:value="1.72438e-10">
            <text:p>1.72438e-10</text:p>
          </table:table-cell>
          <table:table-cell office:value-type="float" office:value="5.29656e-07">
            <text:p>5.29656e-07</text:p>
          </table:table-cell>
          <table:table-cell office:value-type="float" office:value="8.69549e-11">
            <text:p>8.69549e-11</text:p>
          </table:table-cell>
          <table:table-cell office:value-type="float" office:value="2.42135e-11">
            <text:p>2.42135e-11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2.64753e-07">
            <text:p>2.64753e-07</text:p>
          </table:table-cell>
          <table:table-cell office:value-type="float" office:value="1.24011e-10">
            <text:p>1.24011e-10</text:p>
          </table:table-cell>
          <table:table-cell office:value-type="float" office:value="2.64853e-07">
            <text:p>2.64853e-07</text:p>
          </table:table-cell>
          <table:table-cell office:value-type="float" office:value="1.24011e-10">
            <text:p>1.24011e-10</text:p>
          </table:table-cell>
          <table:table-cell office:value-type="float" office:value="4.98988e-11">
            <text:p>4.98988e-11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1.32537e-07">
            <text:p>1.32537e-07</text:p>
          </table:table-cell>
          <table:table-cell office:value-type="float" office:value="4.68887e-10">
            <text:p>4.68887e-10</text:p>
          </table:table-cell>
          <table:table-cell office:value-type="float" office:value="1.32489e-07">
            <text:p>1.32489e-07</text:p>
          </table:table-cell>
          <table:table-cell office:value-type="float" office:value="2.72236e-10">
            <text:p>2.72236e-10</text:p>
          </table:table-cell>
          <table:table-cell office:value-type="float" office:value="2.42135e-11">
            <text:p>2.42135e-11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6.61324e-08">
            <text:p>6.61324e-08</text:p>
          </table:table-cell>
          <table:table-cell office:value-type="float" office:value="2.42135e-11">
            <text:p>2.42135e-11</text:p>
          </table:table-cell>
          <table:table-cell office:value-type="float" office:value="6.6084e-08">
            <text:p>6.6084e-08</text:p>
          </table:table-cell>
          <table:table-cell office:value-type="float" office:value="2.42135e-11">
            <text:p>2.42135e-11</text:p>
          </table:table-cell>
          <table:table-cell office:value-type="float" office:value="2.42135e-11">
            <text:p>2.42135e-11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3.3523e-08">
            <text:p>3.3523e-08</text:p>
          </table:table-cell>
          <table:table-cell office:value-type="float" office:value="1.50646e-09">
            <text:p>1.50646e-09</text:p>
          </table:table-cell>
          <table:table-cell office:value-type="float" office:value="3.28816e-08">
            <text:p>3.28816e-08</text:p>
          </table:table-cell>
          <table:table-cell office:value-type="float" office:value="2.72236e-10">
            <text:p>2.72236e-10</text:p>
          </table:table-cell>
          <table:table-cell office:value-type="float" office:value="3.20663e-10">
            <text:p>3.20663e-10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1.69218e-08">
            <text:p>1.69218e-08</text:p>
          </table:table-cell>
          <table:table-cell office:value-type="float" office:value="1.50646e-09">
            <text:p>1.50646e-09</text:p>
          </table:table-cell>
          <table:table-cell office:value-type="float" office:value="1.86521e-08">
            <text:p>1.86521e-08</text:p>
          </table:table-cell>
          <table:table-cell office:value-type="float" office:value="5.60832e-09">
            <text:p>5.60832e-09</text:p>
          </table:table-cell>
          <table:table-cell office:value-type="float" office:value="8.65134e-10">
            <text:p>8.65134e-10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7.43544e-09">
            <text:p>7.43544e-09</text:p>
          </table:table-cell>
          <table:table-cell office:value-type="float" office:value="3.20663e-10">
            <text:p>3.20663e-10</text:p>
          </table:table-cell>
          <table:table-cell office:value-type="float" office:value="1.15373e-08">
            <text:p>1.15373e-08</text:p>
          </table:table-cell>
          <table:table-cell office:value-type="float" office:value="6.79412e-09">
            <text:p>6.79412e-09</text:p>
          </table:table-cell>
          <table:table-cell office:value-type="float" office:value="2.05093e-09">
            <text:p>2.05093e-09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2.69226e-09">
            <text:p>2.69226e-09</text:p>
          </table:table-cell>
          <table:table-cell office:value-type="float" office:value="2.69226e-09">
            <text:p>2.69226e-09</text:p>
          </table:table-cell>
          <table:table-cell office:value-type="float" office:value="6.79412e-09">
            <text:p>6.79412e-09</text:p>
          </table:table-cell>
          <table:table-cell office:value-type="float" office:value="6.79412e-09">
            <text:p>6.79412e-09</text:p>
          </table:table-cell>
          <table:table-cell office:value-type="float" office:value="2.05093e-09">
            <text:p>2.05093e-09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1.21786e-08">
            <text:p>1.21786e-08</text:p>
          </table:table-cell>
          <table:table-cell office:value-type="float" office:value="3.11514e-08">
            <text:p>3.11514e-08</text:p>
          </table:table-cell>
          <table:table-cell office:value-type="float" office:value="6.79412e-09">
            <text:p>6.79412e-09</text:p>
          </table:table-cell>
          <table:table-cell office:value-type="float" office:value="1.62805e-08">
            <text:p>1.62805e-08</text:p>
          </table:table-cell>
          <table:table-cell office:value-type="float" office:value="2.69226e-09">
            <text:p>2.69226e-09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1.21786e-08">
            <text:p>1.21786e-08</text:p>
          </table:table-cell>
          <table:table-cell office:value-type="float" office:value="3.11514e-08">
            <text:p>3.11514e-08</text:p>
          </table:table-cell>
          <table:table-cell office:value-type="float" office:value="2.57669e-08">
            <text:p>2.57669e-08</text:p>
          </table:table-cell>
          <table:table-cell office:value-type="float" office:value="6.37124e-08">
            <text:p>6.37124e-08</text:p>
          </table:table-cell>
          <table:table-cell office:value-type="float" office:value="6.79412e-09">
            <text:p>6.79412e-09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1.21786e-08">
            <text:p>1.21786e-08</text:p>
          </table:table-cell>
          <table:table-cell office:value-type="float" office:value="5.01241e-08">
            <text:p>5.01241e-08</text:p>
          </table:table-cell>
          <table:table-cell office:value-type="float" office:value="1.21786e-08">
            <text:p>1.21786e-08</text:p>
          </table:table-cell>
          <table:table-cell office:value-type="float" office:value="1.21786e-08">
            <text:p>1.21786e-08</text:p>
          </table:table-cell>
          <table:table-cell office:value-type="float" office:value="1.21786e-08">
            <text:p>1.21786e-08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6.37124e-08">
            <text:p>6.37124e-08</text:p>
          </table:table-cell>
          <table:table-cell office:value-type="float" office:value="6.37124e-08">
            <text:p>6.37124e-08</text:p>
          </table:table-cell>
          <table:table-cell office:value-type="float" office:value="6.37124e-08">
            <text:p>6.37124e-08</text:p>
          </table:table-cell>
          <table:table-cell office:value-type="float" office:value="2.15494e-07">
            <text:p>2.15494e-07</text:p>
          </table:table-cell>
          <table:table-cell office:value-type="float" office:value="6.37124e-08">
            <text:p>6.37124e-08</text:p>
          </table:table-cell>
        </table:table-row>
      </table:table>
      <table:table table:name="long_double_0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193839">
            <text:p>0.193839</text:p>
          </table:table-cell>
          <table:table-cell office:value-type="float" office:value="0.0147551">
            <text:p>0.0147551</text:p>
          </table:table-cell>
          <table:table-cell office:value-type="float" office:value="0.193839">
            <text:p>0.193839</text:p>
          </table:table-cell>
          <table:table-cell office:value-type="float" office:value="0.0147551">
            <text:p>0.014755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978598">
            <text:p>0.0978598</text:p>
          </table:table-cell>
          <table:table-cell office:value-type="float" office:value="0.00188035">
            <text:p>0.00188035</text:p>
          </table:table-cell>
          <table:table-cell office:value-type="float" office:value="0.0978598">
            <text:p>0.0978598</text:p>
          </table:table-cell>
          <table:table-cell office:value-type="float" office:value="0.00188035">
            <text:p>0.0018803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49048">
            <text:p>0.049048</text:p>
          </table:table-cell>
          <table:table-cell office:value-type="float" office:value="0.000236179">
            <text:p>0.000236179</text:p>
          </table:table-cell>
          <table:table-cell office:value-type="float" office:value="0.049048">
            <text:p>0.049048</text:p>
          </table:table-cell>
          <table:table-cell office:value-type="float" office:value="0.000236179">
            <text:p>0.00023617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245388">
            <text:p>0.0245388</text:p>
          </table:table-cell>
          <table:table-cell office:value-type="float" office:value="2.9558e-05">
            <text:p>2.9558e-05</text:p>
          </table:table-cell>
          <table:table-cell office:value-type="float" office:value="0.0245388">
            <text:p>0.0245388</text:p>
          </table:table-cell>
          <table:table-cell office:value-type="float" office:value="2.9558e-05">
            <text:p>2.9558e-0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122712">
            <text:p>0.0122712</text:p>
          </table:table-cell>
          <table:table-cell office:value-type="float" office:value="3.69587e-06">
            <text:p>3.69587e-06</text:p>
          </table:table-cell>
          <table:table-cell office:value-type="float" office:value="0.0122712">
            <text:p>0.0122712</text:p>
          </table:table-cell>
          <table:table-cell office:value-type="float" office:value="3.69587e-06">
            <text:p>3.69587e-0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0.00613585">
            <text:p>0.00613585</text:p>
          </table:table-cell>
          <table:table-cell office:value-type="float" office:value="4.62018e-07">
            <text:p>4.62018e-07</text:p>
          </table:table-cell>
          <table:table-cell office:value-type="float" office:value="0.00613585">
            <text:p>0.00613585</text:p>
          </table:table-cell>
          <table:table-cell office:value-type="float" office:value="4.62018e-07">
            <text:p>4.62018e-0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0.00306795">
            <text:p>0.00306795</text:p>
          </table:table-cell>
          <table:table-cell office:value-type="float" office:value="5.77533e-08">
            <text:p>5.77533e-08</text:p>
          </table:table-cell>
          <table:table-cell office:value-type="float" office:value="0.00306795">
            <text:p>0.00306795</text:p>
          </table:table-cell>
          <table:table-cell office:value-type="float" office:value="5.77533e-08">
            <text:p>5.77533e-0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0.00153398">
            <text:p>0.00153398</text:p>
          </table:table-cell>
          <table:table-cell office:value-type="float" office:value="7.2192e-09">
            <text:p>7.2192e-09</text:p>
          </table:table-cell>
          <table:table-cell office:value-type="float" office:value="0.00153398">
            <text:p>0.00153398</text:p>
          </table:table-cell>
          <table:table-cell office:value-type="float" office:value="7.2192e-09">
            <text:p>7.2192e-0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0.00076699">
            <text:p>0.00076699</text:p>
          </table:table-cell>
          <table:table-cell office:value-type="float" office:value="9.02401e-10">
            <text:p>9.02401e-10</text:p>
          </table:table-cell>
          <table:table-cell office:value-type="float" office:value="0.00076699">
            <text:p>0.00076699</text:p>
          </table:table-cell>
          <table:table-cell office:value-type="float" office:value="9.02401e-10">
            <text:p>9.02401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0.000383495">
            <text:p>0.000383495</text:p>
          </table:table-cell>
          <table:table-cell office:value-type="float" office:value="1.128e-10">
            <text:p>1.128e-10</text:p>
          </table:table-cell>
          <table:table-cell office:value-type="float" office:value="0.000383495">
            <text:p>0.000383495</text:p>
          </table:table-cell>
          <table:table-cell office:value-type="float" office:value="1.128e-10">
            <text:p>1.128e-1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0.000191748">
            <text:p>0.000191748</text:p>
          </table:table-cell>
          <table:table-cell office:value-type="float" office:value="1.41e-11">
            <text:p>1.41e-11</text:p>
          </table:table-cell>
          <table:table-cell office:value-type="float" office:value="0.000191748">
            <text:p>0.000191748</text:p>
          </table:table-cell>
          <table:table-cell office:value-type="float" office:value="1.41e-11">
            <text:p>1.41e-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9.58738e-05">
            <text:p>9.58738e-05</text:p>
          </table:table-cell>
          <table:table-cell office:value-type="float" office:value="1.76245e-12">
            <text:p>1.76245e-12</text:p>
          </table:table-cell>
          <table:table-cell office:value-type="float" office:value="9.58738e-05">
            <text:p>9.58738e-05</text:p>
          </table:table-cell>
          <table:table-cell office:value-type="float" office:value="1.76245e-12">
            <text:p>1.76245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4.79369e-05">
            <text:p>4.79369e-05</text:p>
          </table:table-cell>
          <table:table-cell office:value-type="float" office:value="2.19953e-13">
            <text:p>2.19953e-13</text:p>
          </table:table-cell>
          <table:table-cell office:value-type="float" office:value="4.79369e-05">
            <text:p>4.79369e-05</text:p>
          </table:table-cell>
          <table:table-cell office:value-type="float" office:value="2.19953e-13">
            <text:p>2.19953e-1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2.39684e-05">
            <text:p>2.39684e-05</text:p>
          </table:table-cell>
          <table:table-cell office:value-type="float" office:value="2.8837e-14">
            <text:p>2.8837e-14</text:p>
          </table:table-cell>
          <table:table-cell office:value-type="float" office:value="2.39684e-05">
            <text:p>2.39684e-05</text:p>
          </table:table-cell>
          <table:table-cell office:value-type="float" office:value="2.8837e-14">
            <text:p>2.8837e-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1.19842e-05">
            <text:p>1.19842e-05</text:p>
          </table:table-cell>
          <table:table-cell office:value-type="float" office:value="4.52346e-15">
            <text:p>4.52346e-15</text:p>
          </table:table-cell>
          <table:table-cell office:value-type="float" office:value="1.19842e-05">
            <text:p>1.19842e-05</text:p>
          </table:table-cell>
          <table:table-cell office:value-type="float" office:value="4.52346e-15">
            <text:p>4.52346e-1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5.99211e-06">
            <text:p>5.99211e-06</text:p>
          </table:table-cell>
          <table:table-cell office:value-type="float" office:value="0">
            <text:p>0</text:p>
          </table:table-cell>
          <table:table-cell office:value-type="float" office:value="5.99211e-06">
            <text:p>5.99211e-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2.99606e-06">
            <text:p>2.99606e-06</text:p>
          </table:table-cell>
          <table:table-cell office:value-type="float" office:value="4.52346e-15">
            <text:p>4.52346e-15</text:p>
          </table:table-cell>
          <table:table-cell office:value-type="float" office:value="2.99606e-06">
            <text:p>2.99606e-06</text:p>
          </table:table-cell>
          <table:table-cell office:value-type="float" office:value="4.52346e-15">
            <text:p>4.52346e-1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1.49803e-06">
            <text:p>1.49803e-06</text:p>
          </table:table-cell>
          <table:table-cell office:value-type="float" office:value="1.80938e-14">
            <text:p>1.80938e-14</text:p>
          </table:table-cell>
          <table:table-cell office:value-type="float" office:value="1.49803e-06">
            <text:p>1.49803e-06</text:p>
          </table:table-cell>
          <table:table-cell office:value-type="float" office:value="1.80938e-14">
            <text:p>1.80938e-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7.49014e-07">
            <text:p>7.49014e-07</text:p>
          </table:table-cell>
          <table:table-cell office:value-type="float" office:value="3.61876e-14">
            <text:p>3.61876e-14</text:p>
          </table:table-cell>
          <table:table-cell office:value-type="float" office:value="7.49014e-07">
            <text:p>7.49014e-07</text:p>
          </table:table-cell>
          <table:table-cell office:value-type="float" office:value="3.61876e-14">
            <text:p>3.61876e-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3.74507e-07">
            <text:p>3.74507e-07</text:p>
          </table:table-cell>
          <table:table-cell office:value-type="float" office:value="3.61876e-14">
            <text:p>3.61876e-14</text:p>
          </table:table-cell>
          <table:table-cell office:value-type="float" office:value="3.74507e-07">
            <text:p>3.74507e-07</text:p>
          </table:table-cell>
          <table:table-cell office:value-type="float" office:value="3.61876e-14">
            <text:p>3.61876e-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1.87254e-07">
            <text:p>1.87254e-07</text:p>
          </table:table-cell>
          <table:table-cell office:value-type="float" office:value="7.23753e-14">
            <text:p>7.23753e-14</text:p>
          </table:table-cell>
          <table:table-cell office:value-type="float" office:value="1.87254e-07">
            <text:p>1.87254e-07</text:p>
          </table:table-cell>
          <table:table-cell office:value-type="float" office:value="7.23753e-14">
            <text:p>7.23753e-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9.36267e-08">
            <text:p>9.36267e-08</text:p>
          </table:table-cell>
          <table:table-cell office:value-type="float" office:value="1.44751e-13">
            <text:p>1.44751e-13</text:p>
          </table:table-cell>
          <table:table-cell office:value-type="float" office:value="9.36267e-08">
            <text:p>9.36267e-08</text:p>
          </table:table-cell>
          <table:table-cell office:value-type="float" office:value="1.44751e-13">
            <text:p>1.44751e-1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4.68135e-08">
            <text:p>4.68135e-08</text:p>
          </table:table-cell>
          <table:table-cell office:value-type="float" office:value="2.89501e-13">
            <text:p>2.89501e-13</text:p>
          </table:table-cell>
          <table:table-cell office:value-type="float" office:value="4.68135e-08">
            <text:p>4.68135e-08</text:p>
          </table:table-cell>
          <table:table-cell office:value-type="float" office:value="2.89501e-13">
            <text:p>2.89501e-1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2.34067e-08">
            <text:p>2.34067e-08</text:p>
          </table:table-cell>
          <table:table-cell office:value-type="float" office:value="0">
            <text:p>0</text:p>
          </table:table-cell>
          <table:table-cell office:value-type="float" office:value="2.34067e-08">
            <text:p>2.34067e-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1.17028e-08">
            <text:p>1.17028e-08</text:p>
          </table:table-cell>
          <table:table-cell office:value-type="float" office:value="1.158e-12">
            <text:p>1.158e-12</text:p>
          </table:table-cell>
          <table:table-cell office:value-type="float" office:value="1.17028e-08">
            <text:p>1.17028e-08</text:p>
          </table:table-cell>
          <table:table-cell office:value-type="float" office:value="1.158e-12">
            <text:p>1.158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5.85024e-09">
            <text:p>5.85024e-09</text:p>
          </table:table-cell>
          <table:table-cell office:value-type="float" office:value="2.31601e-12">
            <text:p>2.31601e-12</text:p>
          </table:table-cell>
          <table:table-cell office:value-type="float" office:value="5.85024e-09">
            <text:p>5.85024e-09</text:p>
          </table:table-cell>
          <table:table-cell office:value-type="float" office:value="2.31601e-12">
            <text:p>2.31601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2.92744e-09">
            <text:p>2.92744e-09</text:p>
          </table:table-cell>
          <table:table-cell office:value-type="float" office:value="4.63202e-12">
            <text:p>4.63202e-12</text:p>
          </table:table-cell>
          <table:table-cell office:value-type="float" office:value="2.92744e-09">
            <text:p>2.92744e-09</text:p>
          </table:table-cell>
          <table:table-cell office:value-type="float" office:value="4.63202e-12">
            <text:p>4.63202e-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1.46372e-09">
            <text:p>1.46372e-09</text:p>
          </table:table-cell>
          <table:table-cell office:value-type="float" office:value="0">
            <text:p>0</text:p>
          </table:table-cell>
          <table:table-cell office:value-type="float" office:value="1.46372e-09">
            <text:p>1.46372e-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7.41123e-10">
            <text:p>7.41123e-10</text:p>
          </table:table-cell>
          <table:table-cell office:value-type="float" office:value="1.85281e-11">
            <text:p>1.85281e-11</text:p>
          </table:table-cell>
          <table:table-cell office:value-type="float" office:value="7.41123e-10">
            <text:p>7.41123e-10</text:p>
          </table:table-cell>
          <table:table-cell office:value-type="float" office:value="1.85281e-11">
            <text:p>1.85281e-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3.70561e-10">
            <text:p>3.70561e-10</text:p>
          </table:table-cell>
          <table:table-cell office:value-type="float" office:value="0">
            <text:p>0</text:p>
          </table:table-cell>
          <table:table-cell office:value-type="float" office:value="3.70561e-10">
            <text:p>3.70561e-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long_double_pi_over_2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0255046">
            <text:p>0.0255046</text:p>
          </table:table-cell>
          <table:table-cell office:value-type="float" office:value="0.0486744">
            <text:p>0.0486744</text:p>
          </table:table-cell>
          <table:table-cell office:value-type="float" office:value="0.0255046">
            <text:p>0.0255046</text:p>
          </table:table-cell>
          <table:table-cell office:value-type="float" office:value="0.0486744">
            <text:p>0.0486744</text:p>
          </table:table-cell>
          <table:table-cell office:value-type="float" office:value="0.0255046">
            <text:p>0.0255046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0641315">
            <text:p>0.00641315</text:p>
          </table:table-cell>
          <table:table-cell office:value-type="float" office:value="0.0126783">
            <text:p>0.0126783</text:p>
          </table:table-cell>
          <table:table-cell office:value-type="float" office:value="0.00641315">
            <text:p>0.00641315</text:p>
          </table:table-cell>
          <table:table-cell office:value-type="float" office:value="0.0126783">
            <text:p>0.0126783</text:p>
          </table:table-cell>
          <table:table-cell office:value-type="float" office:value="0.00641315">
            <text:p>0.00641315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0160561">
            <text:p>0.00160561</text:p>
          </table:table-cell>
          <table:table-cell office:value-type="float" office:value="0.00320193">
            <text:p>0.00320193</text:p>
          </table:table-cell>
          <table:table-cell office:value-type="float" office:value="0.00160561">
            <text:p>0.00160561</text:p>
          </table:table-cell>
          <table:table-cell office:value-type="float" office:value="0.00320193">
            <text:p>0.00320193</text:p>
          </table:table-cell>
          <table:table-cell office:value-type="float" office:value="0.00160561">
            <text:p>0.00160561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00401547">
            <text:p>0.000401547</text:p>
          </table:table-cell>
          <table:table-cell office:value-type="float" office:value="0.000802513">
            <text:p>0.000802513</text:p>
          </table:table-cell>
          <table:table-cell office:value-type="float" office:value="0.000401547">
            <text:p>0.000401547</text:p>
          </table:table-cell>
          <table:table-cell office:value-type="float" office:value="0.000802513">
            <text:p>0.000802513</text:p>
          </table:table-cell>
          <table:table-cell office:value-type="float" office:value="0.000401547">
            <text:p>0.000401547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00100396">
            <text:p>0.000100396</text:p>
          </table:table-cell>
          <table:table-cell office:value-type="float" office:value="0.000200755">
            <text:p>0.000200755</text:p>
          </table:table-cell>
          <table:table-cell office:value-type="float" office:value="0.000100396">
            <text:p>0.000100396</text:p>
          </table:table-cell>
          <table:table-cell office:value-type="float" office:value="0.000200755">
            <text:p>0.000200755</text:p>
          </table:table-cell>
          <table:table-cell office:value-type="float" office:value="0.000100396">
            <text:p>0.000100396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2.50995e-05">
            <text:p>2.50995e-05</text:p>
          </table:table-cell>
          <table:table-cell office:value-type="float" office:value="5.01968e-05">
            <text:p>5.01968e-05</text:p>
          </table:table-cell>
          <table:table-cell office:value-type="float" office:value="2.50995e-05">
            <text:p>2.50995e-05</text:p>
          </table:table-cell>
          <table:table-cell office:value-type="float" office:value="5.01968e-05">
            <text:p>5.01968e-05</text:p>
          </table:table-cell>
          <table:table-cell office:value-type="float" office:value="2.50995e-05">
            <text:p>2.50995e-05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6.27491e-06">
            <text:p>6.27491e-06</text:p>
          </table:table-cell>
          <table:table-cell office:value-type="float" office:value="1.25497e-05">
            <text:p>1.25497e-05</text:p>
          </table:table-cell>
          <table:table-cell office:value-type="float" office:value="6.27491e-06">
            <text:p>6.27491e-06</text:p>
          </table:table-cell>
          <table:table-cell office:value-type="float" office:value="1.25497e-05">
            <text:p>1.25497e-05</text:p>
          </table:table-cell>
          <table:table-cell office:value-type="float" office:value="6.27491e-06">
            <text:p>6.27491e-06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1.56873e-06">
            <text:p>1.56873e-06</text:p>
          </table:table-cell>
          <table:table-cell office:value-type="float" office:value="3.13745e-06">
            <text:p>3.13745e-06</text:p>
          </table:table-cell>
          <table:table-cell office:value-type="float" office:value="1.56873e-06">
            <text:p>1.56873e-06</text:p>
          </table:table-cell>
          <table:table-cell office:value-type="float" office:value="3.13745e-06">
            <text:p>3.13745e-06</text:p>
          </table:table-cell>
          <table:table-cell office:value-type="float" office:value="1.56873e-06">
            <text:p>1.56873e-06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3.92183e-07">
            <text:p>3.92183e-07</text:p>
          </table:table-cell>
          <table:table-cell office:value-type="float" office:value="7.84365e-07">
            <text:p>7.84365e-07</text:p>
          </table:table-cell>
          <table:table-cell office:value-type="float" office:value="3.92183e-07">
            <text:p>3.92183e-07</text:p>
          </table:table-cell>
          <table:table-cell office:value-type="float" office:value="7.84365e-07">
            <text:p>7.84365e-07</text:p>
          </table:table-cell>
          <table:table-cell office:value-type="float" office:value="3.92183e-07">
            <text:p>3.92183e-07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9.80457e-08">
            <text:p>9.80457e-08</text:p>
          </table:table-cell>
          <table:table-cell office:value-type="float" office:value="1.96091e-07">
            <text:p>1.96091e-07</text:p>
          </table:table-cell>
          <table:table-cell office:value-type="float" office:value="9.80457e-08">
            <text:p>9.80457e-08</text:p>
          </table:table-cell>
          <table:table-cell office:value-type="float" office:value="1.96091e-07">
            <text:p>1.96091e-07</text:p>
          </table:table-cell>
          <table:table-cell office:value-type="float" office:value="9.80457e-08">
            <text:p>9.80457e-08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2.45114e-08">
            <text:p>2.45114e-08</text:p>
          </table:table-cell>
          <table:table-cell office:value-type="float" office:value="4.90229e-08">
            <text:p>4.90229e-08</text:p>
          </table:table-cell>
          <table:table-cell office:value-type="float" office:value="2.45114e-08">
            <text:p>2.45114e-08</text:p>
          </table:table-cell>
          <table:table-cell office:value-type="float" office:value="4.90229e-08">
            <text:p>4.90229e-08</text:p>
          </table:table-cell>
          <table:table-cell office:value-type="float" office:value="2.45114e-08">
            <text:p>2.45114e-08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6.12786e-09">
            <text:p>6.12786e-09</text:p>
          </table:table-cell>
          <table:table-cell office:value-type="float" office:value="1.22557e-08">
            <text:p>1.22557e-08</text:p>
          </table:table-cell>
          <table:table-cell office:value-type="float" office:value="6.12786e-09">
            <text:p>6.12786e-09</text:p>
          </table:table-cell>
          <table:table-cell office:value-type="float" office:value="1.22557e-08">
            <text:p>1.22557e-08</text:p>
          </table:table-cell>
          <table:table-cell office:value-type="float" office:value="6.12786e-09">
            <text:p>6.12786e-09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1.53196e-09">
            <text:p>1.53196e-09</text:p>
          </table:table-cell>
          <table:table-cell office:value-type="float" office:value="3.06393e-09">
            <text:p>3.06393e-09</text:p>
          </table:table-cell>
          <table:table-cell office:value-type="float" office:value="1.53196e-09">
            <text:p>1.53196e-09</text:p>
          </table:table-cell>
          <table:table-cell office:value-type="float" office:value="3.06393e-09">
            <text:p>3.06393e-09</text:p>
          </table:table-cell>
          <table:table-cell office:value-type="float" office:value="1.53196e-09">
            <text:p>1.53196e-09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3.8299e-10">
            <text:p>3.8299e-10</text:p>
          </table:table-cell>
          <table:table-cell office:value-type="float" office:value="7.65984e-10">
            <text:p>7.65984e-10</text:p>
          </table:table-cell>
          <table:table-cell office:value-type="float" office:value="3.8299e-10">
            <text:p>3.8299e-10</text:p>
          </table:table-cell>
          <table:table-cell office:value-type="float" office:value="7.65984e-10">
            <text:p>7.65984e-10</text:p>
          </table:table-cell>
          <table:table-cell office:value-type="float" office:value="3.8299e-10">
            <text:p>3.8299e-1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9.57467e-11">
            <text:p>9.57467e-11</text:p>
          </table:table-cell>
          <table:table-cell office:value-type="float" office:value="1.91497e-10">
            <text:p>1.91497e-10</text:p>
          </table:table-cell>
          <table:table-cell office:value-type="float" office:value="9.57467e-11">
            <text:p>9.57467e-11</text:p>
          </table:table-cell>
          <table:table-cell office:value-type="float" office:value="1.91497e-10">
            <text:p>1.91497e-10</text:p>
          </table:table-cell>
          <table:table-cell office:value-type="float" office:value="9.57467e-11">
            <text:p>9.57467e-11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2.39404e-11">
            <text:p>2.39404e-11</text:p>
          </table:table-cell>
          <table:table-cell office:value-type="float" office:value="4.78659e-11">
            <text:p>4.78659e-11</text:p>
          </table:table-cell>
          <table:table-cell office:value-type="float" office:value="2.39404e-11">
            <text:p>2.39404e-11</text:p>
          </table:table-cell>
          <table:table-cell office:value-type="float" office:value="4.78659e-11">
            <text:p>4.78659e-11</text:p>
          </table:table-cell>
          <table:table-cell office:value-type="float" office:value="2.39404e-11">
            <text:p>2.39404e-11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5.98767e-12">
            <text:p>5.98767e-12</text:p>
          </table:table-cell>
          <table:table-cell office:value-type="float" office:value="1.1965e-11">
            <text:p>1.1965e-11</text:p>
          </table:table-cell>
          <table:table-cell office:value-type="float" office:value="5.98767e-12">
            <text:p>5.98767e-12</text:p>
          </table:table-cell>
          <table:table-cell office:value-type="float" office:value="1.1965e-11">
            <text:p>1.1965e-11</text:p>
          </table:table-cell>
          <table:table-cell office:value-type="float" office:value="5.98767e-12">
            <text:p>5.98767e-12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1.49949e-12">
            <text:p>1.49949e-12</text:p>
          </table:table-cell>
          <table:table-cell office:value-type="float" office:value="2.98869e-12">
            <text:p>2.98869e-12</text:p>
          </table:table-cell>
          <table:table-cell office:value-type="float" office:value="1.49949e-12">
            <text:p>1.49949e-12</text:p>
          </table:table-cell>
          <table:table-cell office:value-type="float" office:value="2.98869e-12">
            <text:p>2.98869e-12</text:p>
          </table:table-cell>
          <table:table-cell office:value-type="float" office:value="1.49949e-12">
            <text:p>1.49949e-12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3.41259e-13">
            <text:p>3.41259e-13</text:p>
          </table:table-cell>
          <table:table-cell office:value-type="float" office:value="8.16973e-13">
            <text:p>8.16973e-13</text:p>
          </table:table-cell>
          <table:table-cell office:value-type="float" office:value="3.41259e-13">
            <text:p>3.41259e-13</text:p>
          </table:table-cell>
          <table:table-cell office:value-type="float" office:value="8.16973e-13">
            <text:p>8.16973e-13</text:p>
          </table:table-cell>
          <table:table-cell office:value-type="float" office:value="3.41259e-13">
            <text:p>3.41259e-13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1.33123e-13">
            <text:p>1.33123e-13</text:p>
          </table:table-cell>
          <table:table-cell office:value-type="float" office:value="7.50128e-14">
            <text:p>7.50128e-14</text:p>
          </table:table-cell>
          <table:table-cell office:value-type="float" office:value="1.33123e-13">
            <text:p>1.33123e-13</text:p>
          </table:table-cell>
          <table:table-cell office:value-type="float" office:value="7.50128e-14">
            <text:p>7.50128e-14</text:p>
          </table:table-cell>
          <table:table-cell office:value-type="float" office:value="1.33123e-13">
            <text:p>1.33123e-13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8.17555e-14">
            <text:p>8.17555e-14</text:p>
          </table:table-cell>
          <table:table-cell office:value-type="float" office:value="2.96634e-13">
            <text:p>2.96634e-13</text:p>
          </table:table-cell>
          <table:table-cell office:value-type="float" office:value="8.17555e-14">
            <text:p>8.17555e-14</text:p>
          </table:table-cell>
          <table:table-cell office:value-type="float" office:value="2.96634e-13">
            <text:p>2.96634e-13</text:p>
          </table:table-cell>
          <table:table-cell office:value-type="float" office:value="8.17555e-14">
            <text:p>8.17555e-14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9.92873e-14">
            <text:p>9.92873e-14</text:p>
          </table:table-cell>
          <table:table-cell office:value-type="float" office:value="1.16819e-13">
            <text:p>1.16819e-13</text:p>
          </table:table-cell>
          <table:table-cell office:value-type="float" office:value="9.92873e-14">
            <text:p>9.92873e-14</text:p>
          </table:table-cell>
          <table:table-cell office:value-type="float" office:value="1.16819e-13">
            <text:p>1.16819e-13</text:p>
          </table:table-cell>
          <table:table-cell office:value-type="float" office:value="9.92873e-14">
            <text:p>9.92873e-14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4.75332e-13">
            <text:p>4.75332e-13</text:p>
          </table:table-cell>
          <table:table-cell office:value-type="float" office:value="1.04995e-12">
            <text:p>1.04995e-12</text:p>
          </table:table-cell>
          <table:table-cell office:value-type="float" office:value="4.75332e-13">
            <text:p>4.75332e-13</text:p>
          </table:table-cell>
          <table:table-cell office:value-type="float" office:value="1.04995e-12">
            <text:p>1.04995e-12</text:p>
          </table:table-cell>
          <table:table-cell office:value-type="float" office:value="4.75332e-13">
            <text:p>4.75332e-13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6.83768e-13">
            <text:p>6.83768e-13</text:p>
          </table:table-cell>
          <table:table-cell office:value-type="float" office:value="1.84287e-12">
            <text:p>1.84287e-12</text:p>
          </table:table-cell>
          <table:table-cell office:value-type="float" office:value="6.83768e-13">
            <text:p>6.83768e-13</text:p>
          </table:table-cell>
          <table:table-cell office:value-type="float" office:value="1.84287e-12">
            <text:p>1.84287e-12</text:p>
          </table:table-cell>
          <table:table-cell office:value-type="float" office:value="6.83768e-13">
            <text:p>6.83768e-13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1.63197e-12">
            <text:p>1.63197e-12</text:p>
          </table:table-cell>
          <table:table-cell office:value-type="float" office:value="3.9477e-12">
            <text:p>3.9477e-12</text:p>
          </table:table-cell>
          <table:table-cell office:value-type="float" office:value="1.63197e-12">
            <text:p>1.63197e-12</text:p>
          </table:table-cell>
          <table:table-cell office:value-type="float" office:value="3.9477e-12">
            <text:p>3.9477e-12</text:p>
          </table:table-cell>
          <table:table-cell office:value-type="float" office:value="1.63197e-12">
            <text:p>1.63197e-12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1.6319e-12">
            <text:p>1.6319e-12</text:p>
          </table:table-cell>
          <table:table-cell office:value-type="float" office:value="1.63183e-12">
            <text:p>1.63183e-12</text:p>
          </table:table-cell>
          <table:table-cell office:value-type="float" office:value="1.6319e-12">
            <text:p>1.6319e-12</text:p>
          </table:table-cell>
          <table:table-cell office:value-type="float" office:value="1.63183e-12">
            <text:p>1.63183e-12</text:p>
          </table:table-cell>
          <table:table-cell office:value-type="float" office:value="1.6319e-12">
            <text:p>1.6319e-12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1.63188e-12">
            <text:p>1.63188e-12</text:p>
          </table:table-cell>
          <table:table-cell office:value-type="float" office:value="1.63186e-12">
            <text:p>1.63186e-12</text:p>
          </table:table-cell>
          <table:table-cell office:value-type="float" office:value="1.63188e-12">
            <text:p>1.63188e-12</text:p>
          </table:table-cell>
          <table:table-cell office:value-type="float" office:value="1.63186e-12">
            <text:p>1.63186e-12</text:p>
          </table:table-cell>
          <table:table-cell office:value-type="float" office:value="1.63188e-12">
            <text:p>1.63188e-12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1.63188e-12">
            <text:p>1.63188e-12</text:p>
          </table:table-cell>
          <table:table-cell office:value-type="float" office:value="1.63187e-12">
            <text:p>1.63187e-12</text:p>
          </table:table-cell>
          <table:table-cell office:value-type="float" office:value="1.63188e-12">
            <text:p>1.63188e-12</text:p>
          </table:table-cell>
          <table:table-cell office:value-type="float" office:value="1.63187e-12">
            <text:p>1.63187e-12</text:p>
          </table:table-cell>
          <table:table-cell office:value-type="float" office:value="1.63188e-12">
            <text:p>1.63188e-12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3.54243e-11">
            <text:p>3.54243e-11</text:p>
          </table:table-cell>
          <table:table-cell office:value-type="float" office:value="7.24804e-11">
            <text:p>7.24804e-11</text:p>
          </table:table-cell>
          <table:table-cell office:value-type="float" office:value="3.54243e-11">
            <text:p>3.54243e-11</text:p>
          </table:table-cell>
          <table:table-cell office:value-type="float" office:value="7.24804e-11">
            <text:p>7.24804e-11</text:p>
          </table:table-cell>
          <table:table-cell office:value-type="float" office:value="3.54243e-11">
            <text:p>3.54243e-11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3.8688e-11">
            <text:p>3.8688e-11</text:p>
          </table:table-cell>
          <table:table-cell office:value-type="float" office:value="1.128e-10">
            <text:p>1.128e-10</text:p>
          </table:table-cell>
          <table:table-cell office:value-type="float" office:value="3.8688e-11">
            <text:p>3.8688e-11</text:p>
          </table:table-cell>
          <table:table-cell office:value-type="float" office:value="1.128e-10">
            <text:p>1.128e-10</text:p>
          </table:table-cell>
          <table:table-cell office:value-type="float" office:value="3.8688e-11">
            <text:p>3.8688e-11</text:p>
          </table:table-cell>
        </table:table-row>
      </table:table>
      <table:table table:name="long_double_pi_over_4">
        <table:table-row>
          <table:table-cell office:value-type="string">
            <text:p>h</text:p>
          </table:table-cell>
          <table:table-cell office:value-type="string">
            <text:p>log10_h</text:p>
          </table:table-cell>
          <table:table-cell office:value-type="string">
            <text:p>forward_2</text:p>
          </table:table-cell>
          <table:table-cell office:value-type="string">
            <text:p>forward_3</text:p>
          </table:table-cell>
          <table:table-cell office:value-type="string">
            <text:p>backward_2</text:p>
          </table:table-cell>
          <table:table-cell office:value-type="string">
            <text:p>backward_3</text:p>
          </table:table-cell>
          <table:table-cell office:value-type="string">
            <text:p>central_2</text:p>
          </table:table-cell>
        </table:table-row>
        <table:table-row>
          <table:table-cell office:value-type="float" office:value="0.392699">
            <text:p>0.392699</text:p>
          </table:table-cell>
          <table:table-cell office:value-type="float" office:value="-0.40594">
            <text:p>-0.40594</text:p>
          </table:table-cell>
          <table:table-cell office:value-type="float" office:value="0.11903">
            <text:p>0.11903</text:p>
          </table:table-cell>
          <table:table-cell office:value-type="float" office:value="0.0448515">
            <text:p>0.0448515</text:p>
          </table:table-cell>
          <table:table-cell office:value-type="float" office:value="0.1551">
            <text:p>0.1551</text:p>
          </table:table-cell>
          <table:table-cell office:value-type="float" office:value="0.0239845">
            <text:p>0.0239845</text:p>
          </table:table-cell>
          <table:table-cell office:value-type="float" office:value="0.0180345">
            <text:p>0.0180345</text:p>
          </table:table-cell>
        </table:table-row>
        <table:table-row>
          <table:table-cell office:value-type="float" office:value="0.19635">
            <text:p>0.19635</text:p>
          </table:table-cell>
          <table:table-cell office:value-type="float" office:value="-0.70697">
            <text:p>-0.70697</text:p>
          </table:table-cell>
          <table:table-cell office:value-type="float" office:value="0.0646625">
            <text:p>0.0646625</text:p>
          </table:table-cell>
          <table:table-cell office:value-type="float" office:value="0.0102945">
            <text:p>0.0102945</text:p>
          </table:table-cell>
          <table:table-cell office:value-type="float" office:value="0.0737321">
            <text:p>0.0737321</text:p>
          </table:table-cell>
          <table:table-cell office:value-type="float" office:value="0.00763534">
            <text:p>0.00763534</text:p>
          </table:table-cell>
          <table:table-cell office:value-type="float" office:value="0.00453478">
            <text:p>0.00453478</text:p>
          </table:table-cell>
        </table:table-row>
        <table:table-row>
          <table:table-cell office:value-type="float" office:value="0.0981748">
            <text:p>0.0981748</text:p>
          </table:table-cell>
          <table:table-cell office:value-type="float" office:value="-1.008">
            <text:p>-1.008</text:p>
          </table:table-cell>
          <table:table-cell office:value-type="float" office:value="0.0335468">
            <text:p>0.0335468</text:p>
          </table:table-cell>
          <table:table-cell office:value-type="float" office:value="0.00243111">
            <text:p>0.00243111</text:p>
          </table:table-cell>
          <table:table-cell office:value-type="float" office:value="0.0358175">
            <text:p>0.0358175</text:p>
          </table:table-cell>
          <table:table-cell office:value-type="float" office:value="0.00209711">
            <text:p>0.00209711</text:p>
          </table:table-cell>
          <table:table-cell office:value-type="float" office:value="0.00113534">
            <text:p>0.00113534</text:p>
          </table:table-cell>
        </table:table-row>
        <table:table-row>
          <table:table-cell office:value-type="float" office:value="0.0490874">
            <text:p>0.0490874</text:p>
          </table:table-cell>
          <table:table-cell office:value-type="float" office:value="-1.30903">
            <text:p>-1.30903</text:p>
          </table:table-cell>
          <table:table-cell office:value-type="float" office:value="0.0170676">
            <text:p>0.0170676</text:p>
          </table:table-cell>
          <table:table-cell office:value-type="float" office:value="0.000588363">
            <text:p>0.000588363</text:p>
          </table:table-cell>
          <table:table-cell office:value-type="float" office:value="0.0176355">
            <text:p>0.0176355</text:p>
          </table:table-cell>
          <table:table-cell office:value-type="float" office:value="0.000546562">
            <text:p>0.000546562</text:p>
          </table:table-cell>
          <table:table-cell office:value-type="float" office:value="0.000283937">
            <text:p>0.000283937</text:p>
          </table:table-cell>
        </table:table-row>
        <table:table-row>
          <table:table-cell office:value-type="float" office:value="0.0245437">
            <text:p>0.0245437</text:p>
          </table:table-cell>
          <table:table-cell office:value-type="float" office:value="-1.61006">
            <text:p>-1.61006</text:p>
          </table:table-cell>
          <table:table-cell office:value-type="float" office:value="0.00860608">
            <text:p>0.00860608</text:p>
          </table:table-cell>
          <table:table-cell office:value-type="float" office:value="0.000144569">
            <text:p>0.000144569</text:p>
          </table:table-cell>
          <table:table-cell office:value-type="float" office:value="0.00874806">
            <text:p>0.00874806</text:p>
          </table:table-cell>
          <table:table-cell office:value-type="float" office:value="0.000139342">
            <text:p>0.000139342</text:p>
          </table:table-cell>
          <table:table-cell office:value-type="float" office:value="7.09905e-05">
            <text:p>7.09905e-05</text:p>
          </table:table-cell>
        </table:table-row>
        <table:table-row>
          <table:table-cell office:value-type="float" office:value="0.0122718">
            <text:p>0.0122718</text:p>
          </table:table-cell>
          <table:table-cell office:value-type="float" office:value="-1.91109">
            <text:p>-1.91109</text:p>
          </table:table-cell>
          <table:table-cell office:value-type="float" office:value="0.00432095">
            <text:p>0.00432095</text:p>
          </table:table-cell>
          <table:table-cell office:value-type="float" office:value="3.58212e-05">
            <text:p>3.58212e-05</text:p>
          </table:table-cell>
          <table:table-cell office:value-type="float" office:value="0.00435645">
            <text:p>0.00435645</text:p>
          </table:table-cell>
          <table:table-cell office:value-type="float" office:value="3.51678e-05">
            <text:p>3.51678e-05</text:p>
          </table:table-cell>
          <table:table-cell office:value-type="float" office:value="1.7748e-05">
            <text:p>1.7748e-05</text:p>
          </table:table-cell>
        </table:table-row>
        <table:table-row>
          <table:table-cell office:value-type="float" office:value="0.00613592">
            <text:p>0.00613592</text:p>
          </table:table-cell>
          <table:table-cell office:value-type="float" office:value="-2.21212">
            <text:p>-2.21212</text:p>
          </table:table-cell>
          <table:table-cell office:value-type="float" office:value="0.00216493">
            <text:p>0.00216493</text:p>
          </table:table-cell>
          <table:table-cell office:value-type="float" office:value="8.91481e-06">
            <text:p>8.91481e-06</text:p>
          </table:table-cell>
          <table:table-cell office:value-type="float" office:value="0.00217381">
            <text:p>0.00217381</text:p>
          </table:table-cell>
          <table:table-cell office:value-type="float" office:value="8.83313e-06">
            <text:p>8.83313e-06</text:p>
          </table:table-cell>
          <table:table-cell office:value-type="float" office:value="4.43703e-06">
            <text:p>4.43703e-06</text:p>
          </table:table-cell>
        </table:table-row>
        <table:table-row>
          <table:table-cell office:value-type="float" office:value="0.00306796">
            <text:p>0.00306796</text:p>
          </table:table-cell>
          <table:table-cell office:value-type="float" office:value="-2.51315">
            <text:p>-2.51315</text:p>
          </table:table-cell>
          <table:table-cell office:value-type="float" office:value="0.00108358">
            <text:p>0.00108358</text:p>
          </table:table-cell>
          <table:table-cell office:value-type="float" office:value="2.22362e-06">
            <text:p>2.22362e-06</text:p>
          </table:table-cell>
          <table:table-cell office:value-type="float" office:value="0.0010858">
            <text:p>0.0010858</text:p>
          </table:table-cell>
          <table:table-cell office:value-type="float" office:value="2.21341e-06">
            <text:p>2.21341e-06</text:p>
          </table:table-cell>
          <table:table-cell office:value-type="float" office:value="1.10926e-06">
            <text:p>1.10926e-06</text:p>
          </table:table-cell>
        </table:table-row>
        <table:table-row>
          <table:table-cell office:value-type="float" office:value="0.00153398">
            <text:p>0.00153398</text:p>
          </table:table-cell>
          <table:table-cell office:value-type="float" office:value="-2.81418">
            <text:p>-2.81418</text:p>
          </table:table-cell>
          <table:table-cell office:value-type="float" office:value="0.000542067">
            <text:p>0.000542067</text:p>
          </table:table-cell>
          <table:table-cell office:value-type="float" office:value="5.55268e-07">
            <text:p>5.55268e-07</text:p>
          </table:table-cell>
          <table:table-cell office:value-type="float" office:value="0.000542621">
            <text:p>0.000542621</text:p>
          </table:table-cell>
          <table:table-cell office:value-type="float" office:value="5.53992e-07">
            <text:p>5.53992e-07</text:p>
          </table:table-cell>
          <table:table-cell office:value-type="float" office:value="2.77315e-07">
            <text:p>2.77315e-07</text:p>
          </table:table-cell>
        </table:table-row>
        <table:table-row>
          <table:table-cell office:value-type="float" office:value="0.00076699">
            <text:p>0.00076699</text:p>
          </table:table-cell>
          <table:table-cell office:value-type="float" office:value="-3.11521">
            <text:p>-3.11521</text:p>
          </table:table-cell>
          <table:table-cell office:value-type="float" office:value="0.000271103">
            <text:p>0.000271103</text:p>
          </table:table-cell>
          <table:table-cell office:value-type="float" office:value="1.38737e-07">
            <text:p>1.38737e-07</text:p>
          </table:table-cell>
          <table:table-cell office:value-type="float" office:value="0.000271241">
            <text:p>0.000271241</text:p>
          </table:table-cell>
          <table:table-cell office:value-type="float" office:value="1.38578e-07">
            <text:p>1.38578e-07</text:p>
          </table:table-cell>
          <table:table-cell office:value-type="float" office:value="6.93288e-08">
            <text:p>6.93288e-08</text:p>
          </table:table-cell>
        </table:table-row>
        <table:table-row>
          <table:table-cell office:value-type="float" office:value="0.000383495">
            <text:p>0.000383495</text:p>
          </table:table-cell>
          <table:table-cell office:value-type="float" office:value="-3.41624">
            <text:p>-3.41624</text:p>
          </table:table-cell>
          <table:table-cell office:value-type="float" office:value="0.000135569">
            <text:p>0.000135569</text:p>
          </table:table-cell>
          <table:table-cell office:value-type="float" office:value="3.46744e-08">
            <text:p>3.46744e-08</text:p>
          </table:table-cell>
          <table:table-cell office:value-type="float" office:value="0.000135603">
            <text:p>0.000135603</text:p>
          </table:table-cell>
          <table:table-cell office:value-type="float" office:value="3.46544e-08">
            <text:p>3.46544e-08</text:p>
          </table:table-cell>
          <table:table-cell office:value-type="float" office:value="1.73322e-08">
            <text:p>1.73322e-08</text:p>
          </table:table-cell>
        </table:table-row>
        <table:table-row>
          <table:table-cell office:value-type="float" office:value="0.000191748">
            <text:p>0.000191748</text:p>
          </table:table-cell>
          <table:table-cell office:value-type="float" office:value="-3.71727">
            <text:p>-3.71727</text:p>
          </table:table-cell>
          <table:table-cell office:value-type="float" office:value="6.77887e-05">
            <text:p>6.77887e-05</text:p>
          </table:table-cell>
          <table:table-cell office:value-type="float" office:value="8.66734e-09">
            <text:p>8.66734e-09</text:p>
          </table:table-cell>
          <table:table-cell office:value-type="float" office:value="6.77973e-05">
            <text:p>6.77973e-05</text:p>
          </table:table-cell>
          <table:table-cell office:value-type="float" office:value="8.66485e-09">
            <text:p>8.66485e-09</text:p>
          </table:table-cell>
          <table:table-cell office:value-type="float" office:value="4.33305e-09">
            <text:p>4.33305e-09</text:p>
          </table:table-cell>
        </table:table-row>
        <table:table-row>
          <table:table-cell office:value-type="float" office:value="9.58738e-05">
            <text:p>9.58738e-05</text:p>
          </table:table-cell>
          <table:table-cell office:value-type="float" office:value="-4.0183">
            <text:p>-4.0183</text:p>
          </table:table-cell>
          <table:table-cell office:value-type="float" office:value="3.38954e-05">
            <text:p>3.38954e-05</text:p>
          </table:table-cell>
          <table:table-cell office:value-type="float" office:value="2.16668e-09">
            <text:p>2.16668e-09</text:p>
          </table:table-cell>
          <table:table-cell office:value-type="float" office:value="3.38976e-05">
            <text:p>3.38976e-05</text:p>
          </table:table-cell>
          <table:table-cell office:value-type="float" office:value="2.16637e-09">
            <text:p>2.16637e-09</text:p>
          </table:table-cell>
          <table:table-cell office:value-type="float" office:value="1.08326e-09">
            <text:p>1.08326e-09</text:p>
          </table:table-cell>
        </table:table-row>
        <table:table-row>
          <table:table-cell office:value-type="float" office:value="4.79369e-05">
            <text:p>4.79369e-05</text:p>
          </table:table-cell>
          <table:table-cell office:value-type="float" office:value="-4.31933">
            <text:p>-4.31933</text:p>
          </table:table-cell>
          <table:table-cell office:value-type="float" office:value="1.6948e-05">
            <text:p>1.6948e-05</text:p>
          </table:table-cell>
          <table:table-cell office:value-type="float" office:value="5.4165e-10">
            <text:p>5.4165e-10</text:p>
          </table:table-cell>
          <table:table-cell office:value-type="float" office:value="1.69485e-05">
            <text:p>1.69485e-05</text:p>
          </table:table-cell>
          <table:table-cell office:value-type="float" office:value="5.41611e-10">
            <text:p>5.41611e-10</text:p>
          </table:table-cell>
          <table:table-cell office:value-type="float" office:value="2.70816e-10">
            <text:p>2.70816e-10</text:p>
          </table:table-cell>
        </table:table-row>
        <table:table-row>
          <table:table-cell office:value-type="float" office:value="2.39684e-05">
            <text:p>2.39684e-05</text:p>
          </table:table-cell>
          <table:table-cell office:value-type="float" office:value="-4.62036">
            <text:p>-4.62036</text:p>
          </table:table-cell>
          <table:table-cell office:value-type="float" office:value="8.47406e-06">
            <text:p>8.47406e-06</text:p>
          </table:table-cell>
          <table:table-cell office:value-type="float" office:value="1.3541e-10">
            <text:p>1.3541e-10</text:p>
          </table:table-cell>
          <table:table-cell office:value-type="float" office:value="8.47419e-06">
            <text:p>8.47419e-06</text:p>
          </table:table-cell>
          <table:table-cell office:value-type="float" office:value="1.35409e-10">
            <text:p>1.35409e-10</text:p>
          </table:table-cell>
          <table:table-cell office:value-type="float" office:value="6.77031e-11">
            <text:p>6.77031e-11</text:p>
          </table:table-cell>
        </table:table-row>
        <table:table-row>
          <table:table-cell office:value-type="float" office:value="1.19842e-05">
            <text:p>1.19842e-05</text:p>
          </table:table-cell>
          <table:table-cell office:value-type="float" office:value="-4.92139">
            <text:p>-4.92139</text:p>
          </table:table-cell>
          <table:table-cell office:value-type="float" office:value="4.23705e-06">
            <text:p>4.23705e-06</text:p>
          </table:table-cell>
          <table:table-cell office:value-type="float" office:value="3.38507e-11">
            <text:p>3.38507e-11</text:p>
          </table:table-cell>
          <table:table-cell office:value-type="float" office:value="4.23708e-06">
            <text:p>4.23708e-06</text:p>
          </table:table-cell>
          <table:table-cell office:value-type="float" office:value="3.38552e-11">
            <text:p>3.38552e-11</text:p>
          </table:table-cell>
          <table:table-cell office:value-type="float" office:value="1.69251e-11">
            <text:p>1.69251e-11</text:p>
          </table:table-cell>
        </table:table-row>
        <table:table-row>
          <table:table-cell office:value-type="float" office:value="5.99211e-06">
            <text:p>5.99211e-06</text:p>
          </table:table-cell>
          <table:table-cell office:value-type="float" office:value="-5.22242">
            <text:p>-5.22242</text:p>
          </table:table-cell>
          <table:table-cell office:value-type="float" office:value="2.11853e-06">
            <text:p>2.11853e-06</text:p>
          </table:table-cell>
          <table:table-cell office:value-type="float" office:value="8.4628e-12">
            <text:p>8.4628e-12</text:p>
          </table:table-cell>
          <table:table-cell office:value-type="float" office:value="2.11854e-06">
            <text:p>2.11854e-06</text:p>
          </table:table-cell>
          <table:table-cell office:value-type="float" office:value="8.46732e-12">
            <text:p>8.46732e-12</text:p>
          </table:table-cell>
          <table:table-cell office:value-type="float" office:value="4.23002e-12">
            <text:p>4.23002e-12</text:p>
          </table:table-cell>
        </table:table-row>
        <table:table-row>
          <table:table-cell office:value-type="float" office:value="2.99606e-06">
            <text:p>2.99606e-06</text:p>
          </table:table-cell>
          <table:table-cell office:value-type="float" office:value="-5.52345">
            <text:p>-5.52345</text:p>
          </table:table-cell>
          <table:table-cell office:value-type="float" office:value="1.05926e-06">
            <text:p>1.05926e-06</text:p>
          </table:table-cell>
          <table:table-cell office:value-type="float" office:value="2.10282e-12">
            <text:p>2.10282e-12</text:p>
          </table:table-cell>
          <table:table-cell office:value-type="float" office:value="1.05927e-06">
            <text:p>1.05927e-06</text:p>
          </table:table-cell>
          <table:table-cell office:value-type="float" office:value="2.10282e-12">
            <text:p>2.10282e-12</text:p>
          </table:table-cell>
          <table:table-cell office:value-type="float" office:value="1.0636e-12">
            <text:p>1.0636e-12</text:p>
          </table:table-cell>
        </table:table-row>
        <table:table-row>
          <table:table-cell office:value-type="float" office:value="1.49803e-06">
            <text:p>1.49803e-06</text:p>
          </table:table-cell>
          <table:table-cell office:value-type="float" office:value="-5.82448">
            <text:p>-5.82448</text:p>
          </table:table-cell>
          <table:table-cell office:value-type="float" office:value="5.29633e-07">
            <text:p>5.29633e-07</text:p>
          </table:table-cell>
          <table:table-cell office:value-type="float" office:value="4.92468e-13">
            <text:p>4.92468e-13</text:p>
          </table:table-cell>
          <table:table-cell office:value-type="float" office:value="5.29633e-07">
            <text:p>5.29633e-07</text:p>
          </table:table-cell>
          <table:table-cell office:value-type="float" office:value="5.64843e-13">
            <text:p>5.64843e-13</text:p>
          </table:table-cell>
          <table:table-cell office:value-type="float" office:value="2.67472e-13">
            <text:p>2.67472e-13</text:p>
          </table:table-cell>
        </table:table-row>
        <table:table-row>
          <table:table-cell office:value-type="float" office:value="7.49014e-07">
            <text:p>7.49014e-07</text:p>
          </table:table-cell>
          <table:table-cell office:value-type="float" office:value="-6.12551">
            <text:p>-6.12551</text:p>
          </table:table-cell>
          <table:table-cell office:value-type="float" office:value="2.64816e-07">
            <text:p>2.64816e-07</text:p>
          </table:table-cell>
          <table:table-cell office:value-type="float" office:value="1.12498e-13">
            <text:p>1.12498e-13</text:p>
          </table:table-cell>
          <table:table-cell office:value-type="float" office:value="2.64817e-07">
            <text:p>2.64817e-07</text:p>
          </table:table-cell>
          <table:table-cell office:value-type="float" office:value="1.48685e-13">
            <text:p>1.48685e-13</text:p>
          </table:table-cell>
          <table:table-cell office:value-type="float" office:value="6.84404e-14">
            <text:p>6.84404e-14</text:p>
          </table:table-cell>
        </table:table-row>
        <table:table-row>
          <table:table-cell office:value-type="float" office:value="3.74507e-07">
            <text:p>3.74507e-07</text:p>
          </table:table-cell>
          <table:table-cell office:value-type="float" office:value="-6.42654">
            <text:p>-6.42654</text:p>
          </table:table-cell>
          <table:table-cell office:value-type="float" office:value="1.32408e-07">
            <text:p>1.32408e-07</text:p>
          </table:table-cell>
          <table:table-cell office:value-type="float" office:value="3.22528e-14">
            <text:p>3.22528e-14</text:p>
          </table:table-cell>
          <table:table-cell office:value-type="float" office:value="1.32408e-07">
            <text:p>1.32408e-07</text:p>
          </table:table-cell>
          <table:table-cell office:value-type="float" office:value="4.01225e-14">
            <text:p>4.01225e-14</text:p>
          </table:table-cell>
          <table:table-cell office:value-type="float" office:value="3.22528e-14">
            <text:p>3.22528e-14</text:p>
          </table:table-cell>
        </table:table-row>
        <table:table-row>
          <table:table-cell office:value-type="float" office:value="1.87254e-07">
            <text:p>1.87254e-07</text:p>
          </table:table-cell>
          <table:table-cell office:value-type="float" office:value="-6.72757">
            <text:p>-6.72757</text:p>
          </table:table-cell>
          <table:table-cell office:value-type="float" office:value="6.62042e-08">
            <text:p>6.62042e-08</text:p>
          </table:table-cell>
          <table:table-cell office:value-type="float" office:value="1.84873e-13">
            <text:p>1.84873e-13</text:p>
          </table:table-cell>
          <table:table-cell office:value-type="float" office:value="6.62041e-08">
            <text:p>6.62041e-08</text:p>
          </table:table-cell>
          <table:table-cell office:value-type="float" office:value="4.01225e-14">
            <text:p>4.01225e-14</text:p>
          </table:table-cell>
          <table:table-cell office:value-type="float" office:value="4.01225e-14">
            <text:p>4.01225e-14</text:p>
          </table:table-cell>
        </table:table-row>
        <table:table-row>
          <table:table-cell office:value-type="float" office:value="9.36268e-08">
            <text:p>9.36268e-08</text:p>
          </table:table-cell>
          <table:table-cell office:value-type="float" office:value="-7.0286">
            <text:p>-7.0286</text:p>
          </table:table-cell>
          <table:table-cell office:value-type="float" office:value="3.3102e-08">
            <text:p>3.3102e-08</text:p>
          </table:table-cell>
          <table:table-cell office:value-type="float" office:value="1.04628e-13">
            <text:p>1.04628e-13</text:p>
          </table:table-cell>
          <table:table-cell office:value-type="float" office:value="3.31017e-08">
            <text:p>3.31017e-08</text:p>
          </table:table-cell>
          <table:table-cell office:value-type="float" office:value="7.63875e-13">
            <text:p>7.63875e-13</text:p>
          </table:table-cell>
          <table:table-cell office:value-type="float" office:value="1.84873e-13">
            <text:p>1.84873e-13</text:p>
          </table:table-cell>
        </table:table-row>
        <table:table-row>
          <table:table-cell office:value-type="float" office:value="4.68134e-08">
            <text:p>4.68134e-08</text:p>
          </table:table-cell>
          <table:table-cell office:value-type="float" office:value="-7.32963">
            <text:p>-7.32963</text:p>
          </table:table-cell>
          <table:table-cell office:value-type="float" office:value="1.65501e-08">
            <text:p>1.65501e-08</text:p>
          </table:table-cell>
          <table:table-cell office:value-type="float" office:value="1.84164e-12">
            <text:p>1.84164e-12</text:p>
          </table:table-cell>
          <table:table-cell office:value-type="float" office:value="1.65515e-08">
            <text:p>1.65515e-08</text:p>
          </table:table-cell>
          <table:table-cell office:value-type="float" office:value="1.26263e-12">
            <text:p>1.26263e-12</text:p>
          </table:table-cell>
          <table:table-cell office:value-type="float" office:value="6.8363e-13">
            <text:p>6.8363e-13</text:p>
          </table:table-cell>
        </table:table-row>
        <table:table-row>
          <table:table-cell office:value-type="float" office:value="2.34067e-08">
            <text:p>2.34067e-08</text:p>
          </table:table-cell>
          <table:table-cell office:value-type="float" office:value="-7.63066">
            <text:p>-7.63066</text:p>
          </table:table-cell>
          <table:table-cell office:value-type="float" office:value="8.27615e-09">
            <text:p>8.27615e-09</text:p>
          </table:table-cell>
          <table:table-cell office:value-type="float" office:value="2.21138e-12">
            <text:p>2.21138e-12</text:p>
          </table:table-cell>
          <table:table-cell office:value-type="float" office:value="8.27405e-09">
            <text:p>8.27405e-09</text:p>
          </table:table-cell>
          <table:table-cell office:value-type="float" office:value="3.36939e-12">
            <text:p>3.36939e-12</text:p>
          </table:table-cell>
          <table:table-cell office:value-type="float" office:value="1.05338e-12">
            <text:p>1.05338e-12</text:p>
          </table:table-cell>
        </table:table-row>
        <table:table-row>
          <table:table-cell office:value-type="float" office:value="1.17033e-08">
            <text:p>1.17033e-08</text:p>
          </table:table-cell>
          <table:table-cell office:value-type="float" office:value="-7.93169">
            <text:p>-7.93169</text:p>
          </table:table-cell>
          <table:table-cell office:value-type="float" office:value="4.13745e-09">
            <text:p>4.13745e-09</text:p>
          </table:table-cell>
          <table:table-cell office:value-type="float" office:value="1.26263e-12">
            <text:p>1.26263e-12</text:p>
          </table:table-cell>
          <table:table-cell office:value-type="float" office:value="4.13997e-09">
            <text:p>4.13997e-09</text:p>
          </table:table-cell>
          <table:table-cell office:value-type="float" office:value="5.89465e-12">
            <text:p>5.89465e-12</text:p>
          </table:table-cell>
          <table:table-cell office:value-type="float" office:value="1.26263e-12">
            <text:p>1.26263e-12</text:p>
          </table:table-cell>
        </table:table-row>
        <table:table-row>
          <table:table-cell office:value-type="float" office:value="5.85167e-09">
            <text:p>5.85167e-09</text:p>
          </table:table-cell>
          <table:table-cell office:value-type="float" office:value="-8.23272">
            <text:p>-8.23272</text:p>
          </table:table-cell>
          <table:table-cell office:value-type="float" office:value="2.0623e-09">
            <text:p>2.0623e-09</text:p>
          </table:table-cell>
          <table:table-cell office:value-type="float" office:value="1.28427e-11">
            <text:p>1.28427e-11</text:p>
          </table:table-cell>
          <table:table-cell office:value-type="float" office:value="2.06946e-09">
            <text:p>2.06946e-09</text:p>
          </table:table-cell>
          <table:table-cell office:value-type="float" office:value="1.05338e-12">
            <text:p>1.05338e-12</text:p>
          </table:table-cell>
          <table:table-cell office:value-type="float" office:value="3.57864e-12">
            <text:p>3.57864e-12</text:p>
          </table:table-cell>
        </table:table-row>
        <table:table-row>
          <table:table-cell office:value-type="float" office:value="2.92584e-09">
            <text:p>2.92584e-09</text:p>
          </table:table-cell>
          <table:table-cell office:value-type="float" office:value="-8.53375">
            <text:p>-8.53375</text:p>
          </table:table-cell>
          <table:table-cell office:value-type="float" office:value="1.02473e-09">
            <text:p>1.02473e-09</text:p>
          </table:table-cell>
          <table:table-cell office:value-type="float" office:value="1.28427e-11">
            <text:p>1.28427e-11</text:p>
          </table:table-cell>
          <table:table-cell office:value-type="float" office:value="1.03189e-09">
            <text:p>1.03189e-09</text:p>
          </table:table-cell>
          <table:table-cell office:value-type="float" office:value="5.6854e-12">
            <text:p>5.6854e-12</text:p>
          </table:table-cell>
          <table:table-cell office:value-type="float" office:value="3.57864e-12">
            <text:p>3.57864e-12</text:p>
          </table:table-cell>
        </table:table-row>
        <table:table-row>
          <table:table-cell office:value-type="float" office:value="1.46292e-09">
            <text:p>1.46292e-09</text:p>
          </table:table-cell>
          <table:table-cell office:value-type="float" office:value="-8.83478">
            <text:p>-8.83478</text:p>
          </table:table-cell>
          <table:table-cell office:value-type="float" office:value="5.05943e-10">
            <text:p>5.05943e-10</text:p>
          </table:table-cell>
          <table:table-cell office:value-type="float" office:value="1.28427e-11">
            <text:p>1.28427e-11</text:p>
          </table:table-cell>
          <table:table-cell office:value-type="float" office:value="4.94573e-10">
            <text:p>4.94573e-10</text:p>
          </table:table-cell>
          <table:table-cell office:value-type="float" office:value="4.27415e-11">
            <text:p>4.27415e-11</text:p>
          </table:table-cell>
          <table:table-cell office:value-type="float" office:value="5.6854e-12">
            <text:p>5.6854e-12</text:p>
          </table:table-cell>
        </table:table-row>
        <table:table-row>
          <table:table-cell office:value-type="float" office:value="7.31459e-10">
            <text:p>7.31459e-10</text:p>
          </table:table-cell>
          <table:table-cell office:value-type="float" office:value="-9.13581">
            <text:p>-9.13581</text:p>
          </table:table-cell>
          <table:table-cell office:value-type="float" office:value="2.4655e-10">
            <text:p>2.4655e-10</text:p>
          </table:table-cell>
          <table:table-cell office:value-type="float" office:value="1.28427e-11">
            <text:p>1.28427e-11</text:p>
          </table:table-cell>
          <table:table-cell office:value-type="float" office:value="1.98123e-10">
            <text:p>1.98123e-10</text:p>
          </table:table-cell>
          <table:table-cell office:value-type="float" office:value="9.83258e-11">
            <text:p>9.83258e-11</text:p>
          </table:table-cell>
          <table:table-cell office:value-type="float" office:value="2.42135e-11">
            <text:p>2.42135e-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